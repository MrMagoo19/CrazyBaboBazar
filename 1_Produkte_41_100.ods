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9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www.amazon.de/Deezee-Stress-Ba-ls/dp/B08NDXP8T3?pd_rd_w=23h8y&amp;content-id=amzn1.sym.90ebbde0-d221-44ff-a415-baa20aad13a3&amp;pf_rd_p=90ebbde0-d221-44ff-a415-baa20aad13a3&amp;pf_rd_r=74SS6KVQ7P13RGZQZH2C&amp;pd_rd_wg=xdtaa&amp;pd_rd_r=56717eb9-6034-491c-86d6-15fc4c0cd7d9&amp;pd_rd_i=B08NDXP8T3&amp;psc=1&amp;linkCode=ll2&amp;tag=geeklist-21&amp;linkId=bda294dd71957f9f59b766f0140d9686&amp;ref_=as_li_ss_tl</text:p>
          </table:table-cell>
        </table:table-row>
        <table:table-row table:style-name="ro1">
          <table:table-cell office:value-type="string" calcext:value-type="string">
            <text:p>https://www.amazon.de/dp/B005J891CQ?coliid=IXW9H9I9W48BD&amp;colid=1VQK9PCRQEC5P&amp;psc=1&amp;linkCode=ll2&amp;tag=geeklist-21&amp;linkId=f662c39a990a959341561b33291417be&amp;ref_=as_li_ss_tl</text:p>
          </table:table-cell>
        </table:table-row>
        <table:table-row table:style-name="ro1">
          <table:table-cell office:value-type="string" calcext:value-type="string">
            <text:p>https://www.amazon.de/dp/B073BVHY3F?coliid=I117IJ06WUWMYD&amp;colid=1VQK9PCRQEC5P&amp;th=1&amp;linkCode=ll2&amp;tag=geeklist-21&amp;linkId=516ca265b66a8e3e04c9dcd5957ad171&amp;ref_=as_li_ss_tl</text:p>
          </table:table-cell>
        </table:table-row>
        <table:table-row table:style-name="ro1">
          <table:table-cell office:value-type="string" calcext:value-type="string">
            <text:p>https://www.amazon.de/dp/B01DNGEHP6?coliid=I1VHSGSMNW8FVD&amp;colid=1VQK9PCRQEC5P&amp;th=1&amp;linkCode=ll2&amp;tag=geeklist-21&amp;linkId=ada1dbfa3871751145d409c7d2fc7015&amp;ref_=as_li_ss_tl</text:p>
          </table:table-cell>
        </table:table-row>
        <table:table-row table:style-name="ro1">
          <table:table-cell office:value-type="string" calcext:value-type="string">
            <text:p>https://www.amazon.de/dp/B0FQC2LWXV?coliid=IUCGAUZHXR78F&amp;colid=1VQK9PCRQEC5P&amp;psc=1&amp;linkCode=ll2&amp;tag=geeklist-21&amp;linkId=f898dac57affda5c5c93129d331e2692&amp;ref_=as_li_ss_tl</text:p>
          </table:table-cell>
        </table:table-row>
        <table:table-row table:style-name="ro1">
          <table:table-cell office:value-type="string" calcext:value-type="string">
            <text:p>https://www.amazon.de/dp/B0F7QXK79S?coliid=I16Q20QTU8G5HB&amp;colid=1VQK9PCRQEC5P&amp;psc=1&amp;linkCode=ll2&amp;tag=geeklist-21&amp;linkId=2d001cca019b26e93c0eca8f035aac5f&amp;ref_=as_li_ss_tl</text:p>
          </table:table-cell>
        </table:table-row>
        <table:table-row table:style-name="ro1">
          <table:table-cell office:value-type="string" calcext:value-type="string">
            <text:p>https://www.amazon.de/dp/B07H459T1C?coliid=I3JYVSXEZMHFCE&amp;colid=1VQK9PCRQEC5P&amp;psc=1&amp;linkCode=ll2&amp;tag=geeklist-21&amp;linkId=fffd378396b60fff5acbe9971459d9ff&amp;ref_=as_li_ss_tl</text:p>
          </table:table-cell>
        </table:table-row>
        <table:table-row table:style-name="ro1">
          <table:table-cell office:value-type="string" calcext:value-type="string">
            <text:p>https://www.amazon.de/dp/B0C4XRNX81?coliid=I1SNBYR2KXE7UT&amp;colid=1VQK9PCRQEC5P&amp;th=1&amp;linkCode=ll2&amp;tag=geeklist-21&amp;linkId=2fee4c08d945ba6601b72a34d5630abb&amp;ref_=as_li_ss_tl</text:p>
          </table:table-cell>
        </table:table-row>
        <table:table-row table:style-name="ro1">
          <table:table-cell office:value-type="string" calcext:value-type="string">
            <text:p>https://www.amazon.de/dp/B01N9TQKSN?coliid=I3I1FWD86UI9BF&amp;colid=1VQK9PCRQEC5P&amp;th=1&amp;linkCode=ll2&amp;tag=geeklist-21&amp;linkId=7f32ee963b33862de9d98ae99aecd4b0&amp;ref_=as_li_ss_tl</text:p>
          </table:table-cell>
        </table:table-row>
        <table:table-row table:style-name="ro1">
          <table:table-cell office:value-type="string" calcext:value-type="string">
            <text:p>https://www.amazon.de/dp/B0C7Q183MT?coliid=I3W2IG6JNNHIM7&amp;colid=1VQK9PCRQEC5P&amp;psc=1&amp;linkCode=ll2&amp;tag=geeklist-21&amp;linkId=feaf44202ab9694d32d2010d76ad539a&amp;ref_=as_li_ss_tl</text:p>
          </table:table-cell>
        </table:table-row>
        <table:table-row table:style-name="ro1">
          <table:table-cell office:value-type="string" calcext:value-type="string">
            <text:p>https://www.amazon.de/dp/B0D6NPSN4N?coliid=I2A01CTS1FSRD6&amp;colid=1VQK9PCRQEC5P&amp;psc=1&amp;linkCode=ll2&amp;tag=geeklist-21&amp;linkId=f79e783aa1455ffef636500604c407db&amp;ref_=as_li_ss_tl</text:p>
          </table:table-cell>
        </table:table-row>
        <table:table-row table:style-name="ro1">
          <table:table-cell office:value-type="string" calcext:value-type="string">
            <text:p>https://www.amazon.de/dp/B0FJR6KDRC?coliid=I23EK96D82B98V&amp;colid=1VQK9PCRQEC5P&amp;th=1&amp;linkCode=ll2&amp;tag=geeklist-21&amp;linkId=9cfce1abb7021da870297acf7f2e32b0&amp;ref_=as_li_ss_tl</text:p>
          </table:table-cell>
        </table:table-row>
        <table:table-row table:style-name="ro1">
          <table:table-cell office:value-type="string" calcext:value-type="string">
            <text:p>https://www.amazon.de/dp/B09T3K9ZC6?coliid=I2U86O7CJY5MTA&amp;colid=1VQK9PCRQEC5P&amp;th=1&amp;linkCode=ll2&amp;tag=geeklist-21&amp;linkId=9c218d0c1b4518473b22af09d03b27cf&amp;ref_=as_li_ss_tl</text:p>
          </table:table-cell>
        </table:table-row>
        <table:table-row table:style-name="ro1">
          <table:table-cell office:value-type="string" calcext:value-type="string">
            <text:p>https://www.amazon.de/dp/B0CWD84XWC?coliid=I3FC0055APYJ5A&amp;colid=1VQK9PCRQEC5P&amp;th=1&amp;linkCode=ll2&amp;tag=geeklist-21&amp;linkId=1356bdee2baba80133c243c36cc82541&amp;ref_=as_li_ss_tl</text:p>
          </table:table-cell>
        </table:table-row>
        <table:table-row table:style-name="ro1">
          <table:table-cell office:value-type="string" calcext:value-type="string">
            <text:p>https://www.amazon.de/dp/B0G1HVY3QG?coliid=I1YZHN646NL7G4&amp;colid=1VQK9PCRQEC5P&amp;psc=1&amp;linkCode=ll2&amp;tag=geeklist-21&amp;linkId=e8f920d0877bf470e9b4499521d03515&amp;ref_=as_li_ss_tl</text:p>
          </table:table-cell>
        </table:table-row>
        <table:table-row table:style-name="ro1">
          <table:table-cell office:value-type="string" calcext:value-type="string">
            <text:p>https://www.amazon.de/dp/B0FTFZ8ZBJ?coliid=I1B1Z2JHGVN8E3&amp;colid=1VQK9PCRQEC5P&amp;th=1&amp;linkCode=ll2&amp;tag=geeklist-21&amp;linkId=146617674c95114723fc5a1e922af1e7&amp;ref_=as_li_ss_tl</text:p>
          </table:table-cell>
        </table:table-row>
        <table:table-row table:style-name="ro1">
          <table:table-cell office:value-type="string" calcext:value-type="string">
            <text:p>https://www.amazon.de/dp/B0D4PMN2MD?coliid=I2IH7TUJY62QFF&amp;colid=1VQK9PCRQEC5P&amp;th=1&amp;linkCode=ll2&amp;tag=geeklist-21&amp;linkId=b559cdf38eecab6186819be0319ba686&amp;ref_=as_li_ss_tl</text:p>
          </table:table-cell>
        </table:table-row>
        <table:table-row table:style-name="ro1">
          <table:table-cell office:value-type="string" calcext:value-type="string">
            <text:p>https://www.amazon.de/dp/B097YS4QSQ?coliid=I25Y8YQ8K9N35N&amp;colid=1VQK9PCRQEC5P&amp;th=1&amp;linkCode=ll2&amp;tag=geeklist-21&amp;linkId=145c0c6c5212e6d2bc502e25d6f054fb&amp;ref_=as_li_ss_tl</text:p>
          </table:table-cell>
        </table:table-row>
        <table:table-row table:style-name="ro1">
          <table:table-cell office:value-type="string" calcext:value-type="string">
            <text:p>https://www.amazon.de/dp/B072J81BP6?coliid=I6N02JVONN48K&amp;colid=1VQK9PCRQEC5P&amp;th=1&amp;linkCode=ll2&amp;tag=geeklist-21&amp;linkId=6b4e34cb1208f25b7e239ddcc4300721&amp;ref_=as_li_ss_tl</text:p>
          </table:table-cell>
        </table:table-row>
        <table:table-row table:style-name="ro1">
          <table:table-cell office:value-type="string" calcext:value-type="string">
            <text:p>https://www.amazon.de/dp/B0C9HQ6FSG?coliid=I1XHSL0U4NTRQA&amp;colid=1VQK9PCRQEC5P&amp;th=1&amp;linkCode=ll2&amp;tag=geeklist-21&amp;linkId=39f25d58fb9351711d7742abb2811d3a&amp;ref_=as_li_ss_tl</text:p>
          </table:table-cell>
        </table:table-row>
        <table:table-row table:style-name="ro1">
          <table:table-cell office:value-type="string" calcext:value-type="string">
            <text:p>https://www.amazon.de/dp/B0B45RTFQH?coliid=I3VBWJ5PWQ9RJY&amp;colid=1VQK9PCRQEC5P&amp;th=1&amp;linkCode=ll2&amp;tag=geeklist-21&amp;linkId=162fbe8d9f848345293e8f91e8bbd858&amp;ref_=as_li_ss_tl</text:p>
          </table:table-cell>
        </table:table-row>
        <table:table-row table:style-name="ro1">
          <table:table-cell office:value-type="string" calcext:value-type="string">
            <text:p>https://www.amazon.de/dp/B0CND7L7SR?coliid=I2BVPF9A1DOU3H&amp;colid=1VQK9PCRQEC5P&amp;th=1&amp;linkCode=ll2&amp;tag=geeklist-21&amp;linkId=2c650c81f2b9f9dde4957ecd792247e8&amp;ref_=as_li_ss_tl</text:p>
          </table:table-cell>
        </table:table-row>
        <table:table-row table:style-name="ro1">
          <table:table-cell office:value-type="string" calcext:value-type="string">
            <text:p>https://www.amazon.de/dp/B078CPWMK9?coliid=I3LIJC4VRL3HJQ&amp;colid=1VQK9PCRQEC5P&amp;psc=1&amp;linkCode=ll2&amp;tag=geeklist-21&amp;linkId=a31966ba97f937aa8055cf8dc9c41db2&amp;ref_=as_li_ss_tl</text:p>
          </table:table-cell>
        </table:table-row>
        <table:table-row table:style-name="ro1">
          <table:table-cell office:value-type="string" calcext:value-type="string">
            <text:p>https://www.amazon.de/BUG-SALT-Yellow-St%C3%BCck-Pack/dp/B089CDCCR1?pd_rd_w=Cxqn3&amp;content-id=amzn1.sym.d92bccae-a723-4919-8d82-c15477d46bb5&amp;pf_rd_p=d92bccae-a723-4919-8d82-c15477d46bb5&amp;pf_rd_r=YGA5SCWQTHP1697J6EG5&amp;pd_rd_wg=eNT5C&amp;pd_rd_r=537783db-920e-42d6-a035-ea3968b096a6&amp;pd_rd_i=B089CDCCR1&amp;psc=1&amp;linkCode=ll2&amp;tag=geeklist-21&amp;linkId=8285d66ffcbf91b7727ef7202e34adaa&amp;ref_=as_li_ss_tl</text:p>
          </table:table-cell>
        </table:table-row>
        <table:table-row table:style-name="ro1">
          <table:table-cell office:value-type="string" calcext:value-type="string">
            <text:p>https://www.amazon.de/dp/1452179611?coliid=I1SSD7SHX2H0YV&amp;colid=1VQK9PCRQEC5P&amp;psc=1&amp;linkCode=ll2&amp;tag=geeklist-21&amp;linkId=ec28214ef5711953190f83744b1e8fef&amp;ref_=as_li_ss_tl</text:p>
          </table:table-cell>
        </table:table-row>
        <table:table-row table:style-name="ro1">
          <table:table-cell office:value-type="string" calcext:value-type="string">
            <text:p>https://www.amazon.de/dp/B0BBYX1H6C?coliid=I2Q16OFI8PZ013&amp;colid=1VQK9PCRQEC5P&amp;psc=1&amp;linkCode=ll2&amp;tag=geeklist-21&amp;linkId=5b76ff21823c24570611514f3c534784&amp;ref_=as_li_ss_tl</text:p>
          </table:table-cell>
        </table:table-row>
        <table:table-row table:style-name="ro1">
          <table:table-cell office:value-type="string" calcext:value-type="string">
            <text:p>https://www.amazon.de/dp/B01N7DWPKK?coliid=I2V2D8X4JU7INN&amp;colid=1VQK9PCRQEC5P&amp;psc=1&amp;linkCode=ll2&amp;tag=geeklist-21&amp;linkId=6cd45eb83a566e0d56fa4caaad5a10ca&amp;ref_=as_li_ss_tl</text:p>
          </table:table-cell>
        </table:table-row>
        <table:table-row table:style-name="ro1">
          <table:table-cell office:value-type="string" calcext:value-type="string">
            <text:p>https://www.amazon.de/dp/B0DWKX544C?coliid=I2FYOT9IG2GKKH&amp;colid=1VQK9PCRQEC5P&amp;psc=1&amp;linkCode=ll2&amp;tag=geeklist-21&amp;linkId=2757d8694adf0e987c4a384214da979d&amp;ref_=as_li_ss_tl</text:p>
          </table:table-cell>
        </table:table-row>
        <table:table-row table:style-name="ro1">
          <table:table-cell office:value-type="string" calcext:value-type="string">
            <text:p>https://www.amazon.de/dp/B091JCZNPN?coliid=IZ3HYHVYPFQS4&amp;colid=1VQK9PCRQEC5P&amp;th=1&amp;linkCode=ll2&amp;tag=geeklist-21&amp;linkId=183f2939e7dd5b0693f2e2bb8e1bbb1f&amp;ref_=as_li_ss_tl</text:p>
          </table:table-cell>
        </table:table-row>
        <table:table-row table:style-name="ro1">
          <table:table-cell office:value-type="string" calcext:value-type="string">
            <text:p>https://www.amazon.de/dp/B0DWF4JR58?coliid=I1K3I0Z1OLGR7J&amp;colid=1VQK9PCRQEC5P&amp;psc=1&amp;linkCode=ll2&amp;tag=geeklist-21&amp;linkId=255f4616fc79b02cd84c7955819ad4cc&amp;ref_=as_li_ss_tl</text:p>
          </table:table-cell>
        </table:table-row>
        <table:table-row table:style-name="ro1">
          <table:table-cell office:value-type="string" calcext:value-type="string">
            <text:p>https://www.amazon.de/dp/B08DDJHSVX?coliid=ICFAMJIWZVE3K&amp;colid=1VQK9PCRQEC5P&amp;psc=1&amp;linkCode=ll2&amp;tag=geeklist-21&amp;linkId=e22d3148bd8cd0093214e8e51e42b215&amp;ref_=as_li_ss_tl</text:p>
          </table:table-cell>
        </table:table-row>
        <table:table-row table:style-name="ro1">
          <table:table-cell office:value-type="string" calcext:value-type="string">
            <text:p>https://www.amazon.de/dp/B08666KZG3?coliid=I1LB1OH2M7714Y&amp;colid=1VQK9PCRQEC5P&amp;psc=1&amp;linkCode=ll2&amp;tag=geeklist-21&amp;linkId=cd2e5d15f3d9366979dc056828b7a685&amp;ref_=as_li_ss_tl</text:p>
          </table:table-cell>
        </table:table-row>
        <table:table-row table:style-name="ro1">
          <table:table-cell office:value-type="string" calcext:value-type="string">
            <text:p>https://www.amazon.de/dp/B09P54JMPB?coliid=I35HVW0X14OQWF&amp;colid=1VQK9PCRQEC5P&amp;th=1&amp;linkCode=ll2&amp;tag=geeklist-21&amp;linkId=66735f9d1ae42d4ca1763823c0dddd77&amp;ref_=as_li_ss_tl</text:p>
          </table:table-cell>
        </table:table-row>
        <table:table-row table:style-name="ro1">
          <table:table-cell office:value-type="string" calcext:value-type="string">
            <text:p>https://www.amazon.de/dp/B0B32BJV7N?coliid=IZZZMV7AHQQUX&amp;colid=1VQK9PCRQEC5P&amp;psc=1&amp;linkCode=ll2&amp;tag=geeklist-21&amp;linkId=dda3f2d5492669973f62ddcb3d7af1a7&amp;ref_=as_li_ss_tl</text:p>
          </table:table-cell>
        </table:table-row>
        <table:table-row table:style-name="ro1">
          <table:table-cell office:value-type="string" calcext:value-type="string">
            <text:p>https://www.amazon.de/dp/B07ZRN2YQV?coliid=I334FQRHXP5RZQ&amp;colid=1VQK9PCRQEC5P&amp;th=1&amp;linkCode=ll2&amp;tag=geeklist-21&amp;linkId=03cb04ec7317f4c4b70c6dd44df0a38e&amp;ref_=as_li_ss_tl</text:p>
          </table:table-cell>
        </table:table-row>
        <table:table-row table:style-name="ro1">
          <table:table-cell office:value-type="string" calcext:value-type="string">
            <text:p>https://www.amazon.de/dp/B0F1TKG2HR?coliid=IQ5VN9JNZ05LW&amp;colid=1VQK9PCRQEC5P&amp;th=1&amp;linkCode=ll2&amp;tag=geeklist-21&amp;linkId=e8d22fc29fc15c141a2e8a25f8f144f1&amp;ref_=as_li_ss_tl</text:p>
          </table:table-cell>
        </table:table-row>
        <table:table-row table:style-name="ro1">
          <table:table-cell office:value-type="string" calcext:value-type="string">
            <text:p>https://www.amazon.de/dp/B09XN77DVV?coliid=I6GTHCZ9E218X&amp;colid=1VQK9PCRQEC5P&amp;th=1&amp;linkCode=ll2&amp;tag=geeklist-21&amp;linkId=da64c3b0d25a61a6d94962f96a609e74&amp;ref_=as_li_ss_tl</text:p>
          </table:table-cell>
        </table:table-row>
        <table:table-row table:style-name="ro1">
          <table:table-cell office:value-type="string" calcext:value-type="string">
            <text:p>https://www.amazon.de/Diveblues-Handventilator-Ventilator-Leistungsstarker-Turbo-Technologie/dp/B0GCZVQKKK?dib=eyJ2IjoiMSJ9.6i6cmVFi-pE8Fv4K7JPxjTAQlneqHaE47kwFICZ-FxO96fuxlVAmLepiBrKaitSQyqFNJP-DbT0DqW0tLNXA7he7Aelfo4TgT5JLZLS3WktX-JbMVkmn0VAZk7BNcGHNbp8sEWtLYHRBbPw_O9A3pB2Krh9jnkvXC5fr_b2RYrFmNX-iEb7YtLcfWFP44sCCVkSNDmB6uFRkzKeIUNJhMVhEluuLeetoUyUGoD-m6yY.j0i95uguLtS5SsFosH4m1-AQYf0b1OFjpHZFmDzunaw&amp;dib_tag=se&amp;keywords=Mini%2BRobot%2BUSB%2BFan&amp;qid=1777832523&amp;sr=8-3-spons&amp;aref=V8pYzD3G9r&amp;sp_csd=d2lkZ2V0TmFtZT1zcF9hdGY&amp;th=1&amp;linkCode=ll2&amp;tag=geeklist-21&amp;linkId=0f8a398b09182ef55dd73234ef8e31a6&amp;ref_=as_li_ss_tl</text:p>
          </table:table-cell>
        </table:table-row>
        <table:table-row table:style-name="ro1">
          <table:table-cell office:value-type="string" calcext:value-type="string">
            <text:p>https://www.amazon.de/Giftota-Periodensystem-Elementen-Studenten-Dekoration/dp/B0BRZYZW4S?__mk_de_DE=%C3%85M%C3%85%C5%BD%C3%95%C3%91&amp;content-id=amzn1.sym.b71a394a-02b5-4d20-84e9-65fdad55f7ed%3Aamzn1.sym.b71a394a-02b5-4d20-84e9-65fdad55f7ed&amp;crid=1DPB5XDF5HJUU&amp;cv_ct_cx=Periodensystem%2BPoster%2Bhochwertig&amp;keywords=Periodensystem%2BPoster%2Bhochwertig&amp;pd_rd_i=B0BRZYZW4S&amp;pd_rd_r=d0e317fa-7408-4a65-a593-24487b625139&amp;pd_rd_w=qq6sV&amp;pd_rd_wg=DWy58&amp;pf_rd_p=b71a394a-02b5-4d20-84e9-65fdad55f7ed&amp;pf_rd_r=ZEWBQN1398NQK7EF1S5P&amp;qid=1777832811&amp;sbo=RZvfv%2F%2FHxDF%2BO5021pAnSA%3D%3D&amp;sprefix=periodensystem%2Bposter%2Bhochwertig%2Caps%2C121&amp;sr=1-1-0bff13d2-7188-4a82-bb3a-ccd1e70f0167-spons&amp;aref=mh4WlXMSLd&amp;sp_csd=d2lkZ2V0TmFtZT1zcF9zZWFyY2hfdGhlbWF0aWM&amp;th=1&amp;linkCode=ll2&amp;tag=geeklist-21&amp;linkId=ad705354c592d8c9d3f0722165bc5b78&amp;ref_=as_li_ss_tl</text:p>
          </table:table-cell>
        </table:table-row>
        <table:table-row table:style-name="ro1">
          <table:table-cell office:value-type="string" calcext:value-type="string">
            <text:p>https://www.amazon.de/PetTec-Cam-Hundekamera-Sprachfunktion-Nachtsicht/dp/B07BBN2C8J?__mk_de_DE=%C3%85M%C3%85%C5%BD%C3%95%C3%91&amp;aref=uciwqcHSQr&amp;content-id=amzn1.sym.a08e4f98-c144-4a25-974e-daafa6cd3e96%3Aamzn1.sym.a08e4f98-c144-4a25-974e-daafa6cd3e96&amp;crid=HI9QE89Y3ZN0&amp;cv_ct_cx=Pet%2BCamera%2BTreat%2BDispenser&amp;keywords=Pet%2BCamera%2BTreat%2BDispenser&amp;pd_rd_i=B07BBN2C8J&amp;pd_rd_r=efa9b90f-56d1-457e-999a-eb0d4e8c98e9&amp;pd_rd_w=BJv5J&amp;pd_rd_wg=SEyqO&amp;pf_rd_p=a08e4f98-c144-4a25-974e-daafa6cd3e96&amp;pf_rd_r=M1XEC5743QGDTD4VH8WC&amp;qid=1777832905&amp;sbo=RZvfv%2F%2FHxDF%2BO5021pAnSA%3D%3D&amp;sprefix=pet%2Bcamera%2Btreat%2Bdispenser%2Caps%2C151&amp;sr=1-1-07652b71-81e3-41f8-9097-e46726928fb7&amp;th=1&amp;linkCode=ll2&amp;tag=geeklist-21&amp;linkId=cee251cc6f5f26b6cfa723ff3e9c7f32&amp;ref_=as_li_ss_tl</text:p>
          </table:table-cell>
        </table:table-row>
        <table:table-row table:style-name="ro1">
          <table:table-cell office:value-type="string" calcext:value-type="string">
            <text:p>https://www.amazon.de/PETKIT-Futterautomat-Futterautomaten-Automatischer-Futterspender/dp/B0DMNN1PHL?__mk_de_DE=%C3%85M%C3%85%C5%BD%C3%95%C3%91&amp;content-id=amzn1.sym.54b8112d-c98a-4e2f-ba6b-72a4ca0ff5c2%3Aamzn1.sym.54b8112d-c98a-4e2f-ba6b-72a4ca0ff5c2&amp;crid=HI9QE89Y3ZN0&amp;cv_ct_cx=Pet+Camera+Treat+Dispenser&amp;keywords=Pet+Camera+Treat+Dispenser&amp;pd_rd_i=B0DMNN1PHL&amp;pd_rd_r=efa9b90f-56d1-457e-999a-eb0d4e8c98e9&amp;pd_rd_w=yDdpc&amp;pd_rd_wg=SEyqO&amp;pf_rd_p=54b8112d-c98a-4e2f-ba6b-72a4ca0ff5c2&amp;pf_rd_r=M1XEC5743QGDTD4VH8WC&amp;qid=1777832905&amp;sbo=RZvfv%2F%2FHxDF%2BO5021pAnSA%3D%3D&amp;sprefix=pet+camera+treat+dispenser%2Caps%2C151&amp;sr=1-2-6e6ea531-5af4-4866-af75-1ef299d1c279-spons&amp;aref=nql8HN53NV&amp;sp_csd=d2lkZ2V0TmFtZT1zcF9zZWFyY2hfdGhlbWF0aWM&amp;psc=1&amp;linkCode=ll2&amp;tag=geeklist-21&amp;linkId=d89b6009b730b207c47c13516bfa599b&amp;ref_=as_li_ss_tl</text:p>
          </table:table-cell>
        </table:table-row>
        <table:table-row table:style-name="ro1">
          <table:table-cell office:value-type="string" calcext:value-type="string">
            <text:p>https://www.amazon.de/Theefun-Elektrostatische-Ber%C3%BChrungsempfindliche-P%C3%A4dagogisches-Sph%C3%A4reLichteffekte/dp/B081HXZCRL?__mk_de_DE=%C3%85M%C3%85%C5%BD%C3%95%C3%91&amp;crid=1W2AN5CU62DGD&amp;dib=eyJ2IjoiMSJ9.Abr_6tW9BdhmoAnXXZz4ZtUF4n5XLq_zzE0KQ4TIJDJG6lH-D1GDU2kxYrwQ4Uj43rJ2EogQbUyAfozNvKpT2Bhaq-aXJPjyBcVOEZfVKrYHTgNQiuJyV3Px2EoUo96-ta29jhUAjhS_wWkJgXAX-kokwt2Q0faWD3_pkarr8KsSz8ywjaItHHuBZKmOBddIUSdix07ftonLI5gAjJCZxVFOpH2XJfFdtxyfex3ehIz1wTBC4lWgczyNwd0WxEMFFFtHivNE8aquFlwyE6ElSLH6LlJ258dxZAO5HOAsljA.I_hF0-jAoWVNEeMiV3y-2-rvyFeBAZpa4J8H9nL2XAQ&amp;dib_tag=se&amp;keywords=Plasma%2BBall%2Bklein&amp;qid=1777833081&amp;sprefix=plasma%2Bball%2Bklein%2Caps%2C151&amp;sr=8-2&amp;th=1&amp;linkCode=ll2&amp;tag=geeklist-21&amp;linkId=051907fea8f22331f72828091a01e3f1&amp;ref_=as_li_ss_tl</text:p>
          </table:table-cell>
        </table:table-row>
        <table:table-row table:style-name="ro1">
          <table:table-cell office:value-type="string" calcext:value-type="string">
            <text:p>https://www.amazon.de/Edubini-Digitales-Mikroskop-1000-fache-Vergr%C3%B6%C3%9Ferung/dp/B0FNXB6YX3?__mk_de_DE=%C3%85M%C3%85%C5%BD%C3%95%C3%91&amp;crid=S5PUC7NVC2XT&amp;dib=eyJ2IjoiMSJ9.3iJ42_LmgOWynGqFiKHDgrOoBEi-0FDCknUvCBgH3oUGp3OmIPNVoAJXz1FmGXWedai6bL2Yzn9z8FtM08mvTewJFRODkKgtRf8yEkBut-KwPHMZoiiX0DaSqkfswoXJaK_evvsn13pacdrHUdbrz2MVvtRYRyuTeb7yuhHqXOnfsL99QwyUhV6kGMimZqvxTSTM0hrPTlr4OODRt9_l1ZHDZc8Rlr1a-naoE2kwApa24IIkgL1XKKhPxmYr-rvJvPbABqK4Abq8G2wv147BSgFKhwV2K8aednH2v1O56VM.StWvTk35Y_063jfa8QgkldkueQSEx0nk1ZkccA5EOvE&amp;dib_tag=se&amp;keywords=Pocket%2BMikroskop%2Bf%C3%BCr%2BKinder&amp;qid=1777833165&amp;sprefix=pocket%2Bmikroskop%2Bf%C3%BCr%2Bkinder%2Caps%2C152&amp;sr=8-2-spons&amp;aref=twEwhoqaSu&amp;sp_csd=d2lkZ2V0TmFtZT1zcF9hdGY&amp;th=1&amp;linkCode=ll2&amp;tag=geeklist-21&amp;linkId=f6a31f420bb1e879160f95705d60a7b0&amp;ref_=as_li_ss_tl</text:p>
          </table:table-cell>
        </table:table-row>
        <table:table-row table:style-name="ro1">
          <table:table-cell office:value-type="string" calcext:value-type="string">
            <text:p>https://www.amazon.de/Horizontale-Staubschutze-Spritzwasserdichte-Schutzh%C3%BClle-Case-Retro/dp/B0FK4V5ZN1?__mk_de_DE=%C3%85M%C3%85%C5%BD%C3%95%C3%91&amp;crid=OH8WA51AC8B7&amp;dib=eyJ2IjoiMSJ9.1ZHHwwTe6ZysTfa_JTLJ810oUAqvnRv4xImq-xq2VddPDY-Vxkdyk8Zqi3qY_Lsax2BfaNrMikOBZ2CSL9nQZgz0_APMu_bvAvFTpbpYzf5g_8vonqh-MpHFRJA8b0TdaCPKTgpHJcAMWaITuGRYan9xZ4aEXJMgUkoGUbCZFYaSySci7jSHMmfP0ctdcQpARrJE_xEqLgXBIFRnJcBof0Uu5J9J5bF2bc1q65la2Mc.6O_dNVR6S5e6urrTR0FuxGOmVj7V1ulz21wT5tbdZ2E&amp;dib_tag=se&amp;keywords=Retro%2BKonsolen%2BStaubschutz-Cover&amp;qid=1777833484&amp;sprefix=retro%2Bkonsolen%2Bstaubschutz-cover%2Caps%2C200&amp;sr=8-2&amp;th=1&amp;linkCode=ll2&amp;tag=geeklist-21&amp;linkId=e5d37c614a9870e0d96bf85734488aa8&amp;ref_=as_li_ss_tl</text:p>
          </table:table-cell>
        </table:table-row>
        <table:table-row table:style-name="ro1">
          <table:table-cell office:value-type="string" calcext:value-type="string">
            <text:p>https://www.amazon.de/Rocketbook-Fusion-Wiederverwendbares-Notizbuch-Seitenvorlagen/dp/B07ZHZ9VJT?__mk_de_DE=%C3%85M%C3%85%C5%BD%C3%95%C3%91&amp;crid=261ELBOBNIBSH&amp;dib=eyJ2IjoiMSJ9.H-KJfoP1iy8ZRxBwspJdpCFtySc-_RMcDIoj2x3XaIVR2emROMjTFyFaPfArcZhMHD3MifujRq05TqWIkz1z1kksHSrsUCgJSIn3BNExmTvmUz6kQxvm-10p4kq-CZb1a0wD5jC9uensTKjO5KfPc2cbhrnzizw-nV9NDxnXDgxfYY662agNvFdp296Pe8PDF8u-y_iYa80gZv8ItXYxlKFd4UnkzlPllzdQDvMI6rZb5zCGVXpFLnvXt2ZAGaz9LC3yTWS0GpW1d5-wGMkd1fQtt8Jzr4-d_GOpsRzOjWs.aYoWno2weAqZ5xNggjxkiV8GEKS46CUIeBowzgmMaqw&amp;dib_tag=se&amp;keywords=Reusable%2BSmart%2BNotebook&amp;qid=1777833546&amp;sprefix=reusable%2Bsmart%2Bnotebook%2Caps%2C138&amp;sr=8-10&amp;th=1&amp;linkCode=ll2&amp;tag=geeklist-21&amp;linkId=0eb90df957311e84883510bcf3092797&amp;ref_=as_li_ss_tl</text:p>
          </table:table-cell>
        </table:table-row>
        <table:table-row table:style-name="ro1">
          <table:table-cell office:value-type="string" calcext:value-type="string">
            <text:p>https://www.amazon.de/tomtoc-Wasserresistent-Kabeltasche-Kabelorganizer-Gegenst%C3%A4nde/dp/B0CY57DPW5?__mk_de_DE=%C3%85M%C3%85%C5%BD%C3%95%C3%91&amp;crid=DW5Q9BL7DDLW&amp;dib=eyJ2IjoiMSJ9.x3tzR__xeDJv1ApJ-_ZqGAdwMsq2yju2QiB-9V3BXT5ptr-5fJiX5ARMIHuBFqyBJbD8hze1ZfkJLJOVEwMV8IpSf0Hx-1XJbeZ4a_MttgWMBG5_z_Zd91SK6ch02yuvdNDjax6mH_vFQVzmuaOVBYM2tN4UrZ2SMsHL1x4eBNAD1XAzqkoH9WgZrHGR-SzHMipskto6kMzZ1IJcyy0gEsehk7aJPB2oeJAEP3EHXoA.BEvbldnZy9a5MXbnWu8s-TzmDv4D00SaNxZge7JigeQ&amp;dib_tag=se&amp;keywords=Reise%2BTech%2BPouch&amp;qid=1777833617&amp;sprefix=reise%2Btech%2Bpouch%2Caps%2C140&amp;sr=8-4&amp;th=1&amp;linkCode=ll2&amp;tag=geeklist-21&amp;linkId=2322a78db2c17d47fbe8130fc6bcf8b5&amp;ref_=as_li_ss_tl</text:p>
          </table:table-cell>
        </table:table-row>
        <table:table-row table:style-name="ro1">
          <table:table-cell office:value-type="string" calcext:value-type="string">
            <text:p>https://www.amazon.de/gp/aw/d/B0DDV4W287?_encoding=UTF8&amp;pd_rd_plhdr=t&amp;aaxitk=4eb3e500e417276e269db709186959ce&amp;hsa_cr_id=0&amp;qid=1777833703&amp;sr=1-1-e0fa1fdd-d857-4087-adda-5bd576b25987&amp;aref=ganpNTC15I&amp;pd_rd_w=mwxCS&amp;content-id=amzn1.sym.67616a74-5971-4136-9787-0edce4b0e77e%3Aamzn1.sym.67616a74-5971-4136-9787-0edce4b0e77e&amp;pf_rd_p=67616a74-5971-4136-9787-0edce4b0e77e&amp;pf_rd_r=28612FR3XAEFSFYXYKJK&amp;pd_rd_wg=0n9Ul&amp;pd_rd_r=448d9b3d-d755-479c-b859-d15e907631b9&amp;th=1&amp;linkCode=ll2&amp;tag=geeklist-21&amp;linkId=ede5c80f4a923e221e7999f67fd78150&amp;ref_=as_li_ss_tl</text:p>
          </table:table-cell>
        </table:table-row>
        <table:table-row table:style-name="ro1">
          <table:table-cell office:value-type="string" calcext:value-type="string">
            <text:p>https://www.amazon.de/Zauberw%C3%BCrfel-Magnetisch-Magischer-Stickerless-Aufger%C3%BCstete/dp/B0CBPQ2XWM?__mk_de_DE=%C3%85M%C3%85%C5%BD%C3%95%C3%91&amp;crid=2O3ELL0N3EPV5&amp;dib=eyJ2IjoiMSJ9.G5B955DW6MVQFfjgEn__5GI1wJtBtb7gX5cgqgKNwO3E_v7p9OC7yOmjVlHmBiw_RCpMsOr48qlzuzVsZ5VZCssIrNG4hmxLK_JvSvpQSvVlnR3kQNHrF83TGRiJ9TuElJpB29CPWiqBl-FVe6YSt6S1pFpvs0dz95KtKuMFmIPc_oNjWP7dh7EI5ZFPv675RJiV_hZyfK6VLMDfxvZEJtOrnAEG3HZgu58nLOsz1cXLxEnFEwMMDoCymwT5LTnEZHhtOSaOOwOMr9nYpGAKALZYF2bOkANjlLhGr7AxssA.gyf9DmphLOJz97xVLSCkuMwmFaZoVXQ3rg1hjwv_EAU&amp;dib_tag=se&amp;keywords=Speed%2BCube%2B3x3%2Bmagnetisch&amp;qid=1777833940&amp;sprefix=speed%2Bcube%2B3x3%2Bmagnetisch%2Caps%2C209&amp;sr=8-1-spons&amp;aref=22dqwuhW7v&amp;sp_csd=d2lkZ2V0TmFtZT1zcF9hdGY&amp;th=1&amp;linkCode=ll2&amp;tag=geeklist-21&amp;linkId=93c6edb2316e4d9972676c9e4bec7490&amp;ref_=as_li_ss_tl</text:p>
          </table:table-cell>
        </table:table-row>
        <table:table-row table:style-name="ro1">
          <table:table-cell office:value-type="string" calcext:value-type="string">
            <text:p>https://www.amazon.de/GAN-Zauberw%C3%BCrfel-Intelligenter-Elektronischer-Online-Wettbewerb/dp/B0GFP25Y57?__mk_de_DE=%C3%85M%C3%85%C5%BD%C3%95%C3%91&amp;crid=ZTJATU0T9MB6&amp;dib=eyJ2IjoiMSJ9.hgb7-CkrgMQ_cXfP_ICsNcpXxxsmSIjIAVUiEZKHepPHsCwy9a6dbcDHMSKFdgwZP0Ptd7rBCG0U0-zDLHaXpG6R2gkikG0VdQoZp0oVJ3pt84F_orALVuHMW2eAfcrpeQwnsj1vLP_BhtGL13Y3423NrbFC8-cciMRqQg4feBe_Cu5MEnVszLyKL_SEwtuIbCoaPqP23HyB1JwuFvQ094ZacZ7JhPIu6CFyCa4tdiZFvGcbdZiSWnYnvKg-UFMz4isuolpn7zVm_mcbWCFKIcQx49XhOoqGPmW6PtY4Ews.DYxMCVzbEjSJy5Nf2wpSHllsC6MmOPBNZco5R5bnmPk&amp;dib_tag=se&amp;keywords=Speed%2BCube%2BTimer&amp;qid=1777833975&amp;sprefix=speed%2Bcube%2Btimer%2Caps%2C144&amp;sr=8-1-spons&amp;aref=9LfcvBPjbB&amp;sp_csd=d2lkZ2V0TmFtZT1zcF9hdGY&amp;th=1&amp;linkCode=ll2&amp;tag=geeklist-21&amp;linkId=3249771fd349b2073cffa8ed902e5249&amp;ref_=as_li_ss_tl</text:p>
          </table:table-cell>
        </table:table-row>
        <table:table-row table:style-name="ro1">
          <table:table-cell office:value-type="string" calcext:value-type="string">
            <text:p>https://www.amazon.de/Drehbare-Kosmos-Sternkarte-Sterne-Planeten-entdecken/dp/3440154513?__mk_de_DE=%C3%85M%C3%85%C5%BD%C3%95%C3%91&amp;crid=373E3MLS2PI24&amp;dib=eyJ2IjoiMSJ9.HbMeDxBfdibMiPlLX_zVRZW9CN0CZT4TzyWc0og_q_l2fObkplXL5iLYV7UBiemhmHYnHMPT-2NES3Ahk0qyd9Q6fXlqQdSQo2mUdHBMnD3M0bPlxnhebAgpryb4MHDa-xzebTdMMOunD91uh8xanWrLcA4qVCPgny8rfLhrs868Jc5r-p1gFP1COG_Qk7cI75xPzimkRGHJqHx6tyMB7A4uaJhnO-weHR6mXG3GxPU.HG1NUvnQSKCr-wdxlgkF56ZAhUvWtdg_5-YY954emtM&amp;dib_tag=se&amp;keywords=Sternkarten+Planisphere&amp;qid=1777834025&amp;sprefix=sternkarten+planisphere%2Caps%2C183&amp;sr=8-1&amp;linkCode=ll2&amp;tag=geeklist-21&amp;linkId=26c37e814742a00319a2d7c5ca6f3a50&amp;ref_=as_li_ss_tl</text:p>
          </table:table-cell>
        </table:table-row>
        <table:table-row table:style-name="ro1">
          <table:table-cell office:value-type="string" calcext:value-type="string">
            <text:p>https://www.amazon.de/Aufkleber-Wasserdicht-Aesthetic-Skateboard-Motorrad/dp/B093L2VHBC?__mk_de_DE=%C3%85M%C3%85%C5%BD%C3%95%C3%91&amp;content-id=amzn1.sym.b71a394a-02b5-4d20-84e9-65fdad55f7ed%3Aamzn1.sym.b71a394a-02b5-4d20-84e9-65fdad55f7ed&amp;crid=8PYYRMM5HABC&amp;cv_ct_cx=Tech+Sticker+Pack+Laptop&amp;keywords=Tech+Sticker+Pack+Laptop&amp;pd_rd_i=B093L2VHBC&amp;pd_rd_r=b2a7745b-2088-4d41-892d-ee0fda58edef&amp;pd_rd_w=vdawv&amp;pd_rd_wg=LIPW5&amp;pf_rd_p=b71a394a-02b5-4d20-84e9-65fdad55f7ed&amp;pf_rd_r=CQ0EAW6SJNJA3X11769T&amp;qid=1777834126&amp;sbo=RZvfv%2F%2FHxDF%2BO5021pAnSA%3D%3D&amp;sprefix=tech+sticker+pack+laptop%2Caps%2C149&amp;sr=1-5-0bff13d2-7188-4a82-bb3a-ccd1e70f0167-spons&amp;aref=3wLXplWHY8&amp;sp_csd=d2lkZ2V0TmFtZT1zcF9zZWFyY2hfdGhlbWF0aWM&amp;psc=1&amp;linkCode=ll2&amp;tag=geeklist-21&amp;linkId=4ebefac4ecda594ccf3f4e2e96fc19fe&amp;ref_=as_li_ss_tl</text:p>
          </table:table-cell>
        </table:table-row>
        <table:table-row table:style-name="ro1">
          <table:table-cell office:value-type="string" calcext:value-type="string">
            <text:p>https://www.amazon.de/Fusselroller-Tierhaare-klebriger-Fusselentferner-Hundehaare/dp/B0BN1CRG58?__mk_de_DE=%C3%85M%C3%85%C5%BD%C3%95%C3%91&amp;crid=14NVQF5DE3VQ4&amp;dib=eyJ2IjoiMSJ9.4FDsIdjl5z4O-YlEIEzaFkluF8SezH333t0F95SDzdU7BmqiMZvHSwXgho_piQrtGY3kXagnflMdkDWLltR_UZwX5VB-xaoRbVIbe8-e-uGZ0oPPREnBIPJM8I4GztFTel8EEqGo_khhTzmEOehBPlGLlreDViqfHBSPXyGozoTuDQUIvJLPxD6aOJqz93MC3jHqoPQrpwoZGb-FKBHOtAbY_t_KVlf7eLmxduRVK6I7B9xDL0L11uxu0XJWp05b1cm8lur9gVo3TiOHJAv_VH4iuKvRcMMoIZT_pREoJMg.TWA5XM5k7Ky_PfqReIJTi7J5CBstORUpWSVRTy2JEfY&amp;dib_tag=se&amp;keywords=Tierhaar%2BEntferner%2BRoller%2Bwiederverwendbar&amp;qid=1777834204&amp;s=kitchen&amp;sprefix=tierhaar%2Bentferner%2Broller%2Bwiederverwendbar%2Ckitchen%2C205&amp;sr=1-4&amp;th=1&amp;linkCode=ll2&amp;tag=geeklist-21&amp;linkId=2a1d446ad229a5598a661687febb7167&amp;ref_=as_li_ss_tl</text:p>
          </table:table-cell>
        </table:table-row>
        <table:table-row table:style-name="ro1">
          <table:table-cell office:value-type="string" calcext:value-type="string">
            <text:p>https://www.amazon.de/MX2-AS-MatataStudio-Handmikroskop-Bildschirm-Taschenmikroskop/dp/B0DR8D1FFX?__mk_de_DE=%C3%85M%C3%85%C5%BD%C3%95%C3%91&amp;content-id=amzn1.sym.e8dd953a-64a4-427f-81cd-761d58e959ab%3Aamzn1.sym.e8dd953a-64a4-427f-81cd-761d58e959ab&amp;crid=1Q7FYDIOB77KO&amp;cv_ct_cx=usb%2Bdigital%2Bmikroskop&amp;keywords=usb%2Bdigital%2Bmikroskop&amp;pd_rd_i=B0DR8D1FFX&amp;pd_rd_r=fa12ae20-3418-4229-a2c2-45c61d0b52ee&amp;pd_rd_w=s98Zl&amp;pd_rd_wg=CLQR1&amp;pf_rd_p=e8dd953a-64a4-427f-81cd-761d58e959ab&amp;pf_rd_r=QZMS844JGZ8ZGJFR31R9&amp;qid=1777834297&amp;sbo=RZvfv%2F%2FHxDF%2BO5021pAnSA%3D%3D&amp;sprefix=usb%2Bdigitalmikroskop%2Caps%2C246&amp;sr=1-1-c55cf277-3a11-4db5-8ae5-b460ea65183f-spons&amp;aref=Ezjew5sTJZ&amp;sp_csd=d2lkZ2V0TmFtZT1zcF9zZWFyY2hfdGhlbWF0aWM&amp;th=1&amp;linkCode=ll2&amp;tag=geeklist-21&amp;linkId=6837e87d332934ffb9f1fdebbcc74e8f&amp;ref_=as_li_ss_tl</text:p>
          </table:table-cell>
        </table:table-row>
        <table:table-row table:style-name="ro1">
          <table:table-cell office:value-type="string" calcext:value-type="string">
            <text:p>https://www.amazon.de/dp/B06ZXWWCS4?pd_rd_i=B06ZXWWCS4&amp;pd_rd_w=Gjide&amp;content-id=amzn1.sym.bf6dbf94-e926-4351-8952-c09f45cdef70&amp;pf_rd_p=bf6dbf94-e926-4351-8952-c09f45cdef70&amp;pf_rd_r=JK4W1H92394BQ3S7840E&amp;pd_rd_wg=2r84K&amp;pd_rd_r=2e252cfb-1426-4983-bd46-5ed43aa88420&amp;aref=iN2z3QHIIR&amp;sp_csd=d2lkZ2V0TmFtZT1zcF9kZXRhaWw&amp;th=1&amp;linkCode=ll2&amp;tag=geeklist-21&amp;linkId=737d1702f15008f1dc9e70005c0ec9b3&amp;ref_=as_li_ss_tl</text:p>
          </table:table-cell>
        </table:table-row>
        <table:table-row table:style-name="ro1">
          <table:table-cell office:value-type="string" calcext:value-type="string">
            <text:p>https://www.amazon.de/H%C3%B6henverstellbar-Drehbarer-Ergonomisch-Laptopst%C3%A4nder-Schreibtisch-Grau/dp/B09Y8B81F7?th=1&amp;linkCode=ll2&amp;tag=geeklist-21&amp;linkId=bcddc041140eda44b1b592c443a5a7d6&amp;ref_=as_li_ss_tl</text:p>
          </table:table-cell>
        </table:table-row>
        <table:table-row table:style-name="ro1">
          <table:table-cell office:value-type="string" calcext:value-type="string">
            <text:p>https://www.amazon.de/Vogelspielzeug-ERKOON-Nymphensittich-Wellensittich-Kauspielzeug/dp/B0CT5M2JTJ?dib=eyJ2IjoiMSJ9.G3U3ozxRv-b0DyD46pcgZ8x3h0OVld8PX9VKdlLAt3a4RzJL446u9A0gG6tah_NmRjyaf8GTqxf4FPb_07gDf5Wz1k3VAbXjaAjnpxYY7ylLXRmkpzN7ozH2Cg4pStbJYDHXSzgNYgcM8IoopbdJx7IwbNmdvuDN7ta-bQet31f3BFmSNtNFigUcXrdklR9d1u3bkFi8wJt2kVe2Aun64piKsm-4rlGEcsalyIMuBuenA6eIcWcel4Rlhw_8UQz-FHS7hC9Fr6BoCGNQ9QjNAIsZSo5StyiclyURKldNACw.aq2JUztDj9PiL-qcpwmz5D6sUIYTLvvVlCATDDwD_lI&amp;dib_tag=se&amp;keywords=Vogelfutter%2BForaging%2BToy&amp;qid=1777834619&amp;sr=8-4&amp;th=1&amp;linkCode=ll2&amp;tag=geeklist-21&amp;linkId=2382833f3cd0be4846555213bb19cdd8&amp;ref_=as_li_ss_tl</text:p>
          </table:table-cell>
        </table:table-row>
        <table:table-row table:style-name="ro1">
          <table:table-cell office:value-type="string" calcext:value-type="string">
            <text:p>https://www.amazon.de/Rite-Rain-Notizblock-wetterfest-374-m/dp/B00262E6PU?__mk_de_DE=%C3%85M%C3%85%C5%BD%C3%95%C3%91&amp;crid=2QOYBT5SY1H9A&amp;dib=eyJ2IjoiMSJ9.QlngXiIrqXUubHIU92-HsrkYGsuCOO4zDZB0BaB4Ba-XtFwo4vdPOTFU6D3hLI02cLlOi6e8nfHt7hjbxBq-tf6V9irMYuQEWU87pv49BIz_G6Oz8N9N35KjVzZ5ndLAgTVQqBK3u90tiFM4LsSUK7ob6jKtVfSNQqSVhwf3I66-UeC4rueXZuSudn8ssXJdUf3L8iiqZYMOutn_RPkT5keV0zEyP3Ra6Rk4i0CMxXKCogTQbXbwFVY3k2gsbi9U5Tw8v1Cwi64WNT9ks8pmW8n9puuerQvM5rd79fZ5B0g.NAqQwLIICD7yqbZ4Rbg3vAa6EsleK1tnIRqC9Dr0XA4&amp;dib_tag=se&amp;keywords=Wasserdichtes%2BNotizbuch&amp;qid=1777834681&amp;sprefix=wasserdichtes%2Bnotizbuch%2Caps%2C211&amp;sr=8-9&amp;th=1&amp;linkCode=ll2&amp;tag=geeklist-21&amp;linkId=f492060ae9cd35092cfa5aad9c5f6966&amp;ref_=as_li_ss_tl</text:p>
          </table:table-cell>
        </table:table-row>
        <table:table-row table:style-name="ro1">
          <table:table-cell office:value-type="string" calcext:value-type="string">
            <text:p>https://www.amazon.de/Army-Painter-Pinselhalter-Schw%C3%A4mmen-Miniaturmodellierung/dp/B07Y25DK3J?__mk_de_DE=%C3%85M%C3%85%C5%BD%C3%95%C3%91&amp;crid=11BT3ZYPKCHOG&amp;dib=eyJ2IjoiMSJ9.f4SCO0hx4Z8nGZN19xo787k2snE4PJvolaACwm3lg9POoXLgCIa_RyGzMqI0bWGM_fG_eeZJeaMBuT2f9VDKiJgPYIMuj1-tDgnCKvT2DBoNxCdtsofoS1TKP4l1twDdVnf7Vqh17JR6izh2EDYY4S5GXseB2ILvTC07wXPqT4JYP13HkG_4AnevNRVyRPoEZdxCf0LRqZ-uvo9oyRbbaIP_ZgjakY8jvIrhTf6REeH_T70ZQ14-UOAjalgw0LqSjFYnjgblT-5mFDrl-QY0BNDHA0-wWSx5S5MTpqO3ReQ.ag_mZahYbjg_mzwNFd6G1xLNHvwE0Quij0fkYkF6-oU&amp;dib_tag=se&amp;keywords=Wet+Palette+f%C3%BCr+Miniaturenmaler&amp;qid=1777834725&amp;sprefix=wet+palette+f%C3%BCr+miniaturenmaler%2Caps%2C188&amp;sr=8-2-spons&amp;aref=Kl3kxMZsUG&amp;sp_csd=d2lkZ2V0TmFtZT1zcF9hdGY&amp;psc=1&amp;linkCode=ll2&amp;tag=geeklist-21&amp;linkId=5274981d0810f80ffd5fc5a3e0af6229&amp;ref_=as_li_ss_tl</text:p>
          </table:table-cell>
        </table:table-row>
        <table:table-row table:style-name="ro1">
          <table:table-cell office:value-type="string" calcext:value-type="string">
            <text:p>https://www.amazon.de/gp/aw/d/B07RHL9FKQ?_encoding=UTF8&amp;pd_rd_plhdr=t&amp;aaxitk=9b6389fb0f76b4971bde2a7830d0a9e1&amp;hsa_cr_id=0&amp;qid=1777834930&amp;sr=1-1-1ee1b2e4-01d1-4cd0-b737-4c27ebfc8105&amp;aref=EV1qj6SMUp&amp;pd_rd_w=BtVAj&amp;content-id=amzn1.sym.58538050-dc4d-48e3-988b-4742889016d4%3Aamzn1.sym.58538050-dc4d-48e3-988b-4742889016d4&amp;pf_rd_p=58538050-dc4d-48e3-988b-4742889016d4&amp;pf_rd_r=APMCS722Q5AQY0GFSF8Y&amp;pd_rd_wg=F710S&amp;pd_rd_r=cb9797ff-43ec-4edc-8ee0-088399cceacd&amp;th=1&amp;linkCode=ll2&amp;tag=geeklist-21&amp;linkId=719d715742ef816aee632289ad57aa0d&amp;ref_=as_li_ss_tl</text:p>
          </table:table-cell>
        </table:table-row>
        <table:table-row table:style-name="ro1">
          <table:table-cell office:value-type="string" calcext:value-type="string">
            <text:p>https://www.amazon.de/LEGO-Botanicals-Japanischer-Roter-Ahorn/dp/B0DWF6VKYB?__mk_de_DE=%C3%85M%C3%85%C5%BD%C3%95%C3%91&amp;crid=3NOQWO1Q0DS13&amp;dib=eyJ2IjoiMSJ9.SgreE1ZoVZccgyOQwNYdGFDdNyP4DiAfGP421u8XHOyxrH6KQNlDw9vBVm5Qtlz8zfXt722Fml4-InUhy-nYrubBWvQ9LhB8nEVnQobR4UhEX52ERXZzGSp76auOpONS_MJ4k7YrJ5doT8ULz5_0evFHHQ5e7SqWKADEvSCuBsUCuSIMflGp2Unyg6059BNViJxcvDwPTFZ9ZyCddcMeHx75UMfmVrXi9ajvNmQM5l_52N5Ct3EuOuTPmn3jrRQVdPlHzR5iEJGMlmRR08ts1J-3GigCr0nzzFFwjwZzI3k.MeSgV_hmzeO7HG0JXcEprDyImhZo53N_Tnw0VcnP0zQ&amp;dib_tag=se&amp;keywords=lego%2Bblumen&amp;qid=1777835840&amp;sprefix=lego%2Bblumen%2Caps%2C129&amp;sr=8-17&amp;th=1&amp;linkCode=ll2&amp;tag=geeklist-21&amp;linkId=bb0d63c7f1ed4e778dfeaefd165f0c6b&amp;ref_=as_li_ss_tl</text:p>
          </table:table-cell>
        </table:table-row>
        <table:table-row table:style-name="ro1">
          <table:table-cell office:value-type="string" calcext:value-type="string">
            <text:p>https://www.amazon.de/Lego-Botanicals-Orchidee-Modellbausatz-Valentinstag/dp/B09BNV2Q49?crid=3OLIHQEQXSLZT&amp;dib=eyJ2IjoiMSJ9.lDLMY-b411hlpdyclNwek3gRWjOyBACWEBmBu76jkjUmglCvc0cw3XvX4ZaWB-9gLMOAS5UQXELz93bHjhqstasLjpjbhxraciVM9cMWEGSb6p2awFOyWgYpgbfp3KldaF7lTZp13rYpuGSscPZfh5b9dtWkxzenKTgxZmmNTRJxvUHZxf4WPjnTE9-R8UxRVWLmN4gHSSUx-QuhL-6E87bNrXfbkOmlDXoCdTV8Wq92HlZaFPUXm4Rl176xBTdilXJtQo9O2L2EGIN_0-miLFMmcs5hYTX6OQYNiANLzOw.pDbXoCTjS0SMrzF5-gcLY6UL_-TSnAtR1Dk3PimgOzw&amp;dib_tag=se&amp;keywords=lego%2Borchidee&amp;qid=1777835942&amp;sprefix=lego%2Borch%2Caps%2C159&amp;sr=8-1&amp;th=1&amp;linkCode=ll2&amp;tag=geeklist-21&amp;linkId=ea92a98eae7c5d6a11c1dccf395536b1&amp;ref_=as_li_ss_tl</text:p>
          </table:table-cell>
        </table:table-row>
        <table:table-row table:style-name="ro1">
          <table:table-cell office:value-type="string" calcext:value-type="string">
            <text:p>https://www.amazon.de/synxzen-Yoga-Gartenzwerg-20cm-Meditation/dp/B0DY1RSBR3?crid=3TAQ2QE3K0L47&amp;dib=eyJ2IjoiMSJ9.hghuAeCtdh7avm9eQKut_2bEZMhS0gRBfhVygRY33nEQFjrZety4vvXZl9-M3ectNyNkaH7vP220C-tWn7B5z4ftv0GSIJeDQV4enzZRwncYd1AlQ2xCFB1yBUI3oM7k9g2-Lro3pAcwx0FRIZ2yBTisC8M7M1VjHo3_lRe7XS2WloF7jl_ZyBEO96PKHWkH1bJI4naeNTGB2boyFNjQUOLgD8tVYHgEu6-AM-STYCH46JD64dsLySWMuQlEzwzooC_VqdOJTzYHva6hcAFp16AxFYDIcFdJJTA86turm04.H1HfIwz2Envo03l9pl0aWe9O1XZPWcuChQOav11hG-0&amp;dib_tag=se&amp;keywords=gartenzwerg+meditation&amp;qid=1777839238&amp;sprefix=gartenzwerg+medi%2Caps%2C175&amp;sr=8-1-spons&amp;aref=yz4doMj9Gf&amp;sp_csd=d2lkZ2V0TmFtZT1zcF9hdGY&amp;psc=1&amp;linkCode=ll2&amp;tag=geeklist-21&amp;linkId=66243d65464886bff41154b708febb5c&amp;ref_=as_li_ss_t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.00.0000</text:date>, <text:time style:data-style-name="N2" text:time-value="22:15:11.06672028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3T20:04:18.421181687</meta:creation-date>
    <meta:generator>LibreOffice/24.2.7.2$Linux_X86_64 LibreOffice_project/420$Build-2</meta:generator>
    <dc:date>2026-05-03T22:15:23.009915824</dc:date>
    <meta:editing-duration>PT1H4M5S</meta:editing-duration>
    <meta:editing-cycles>5</meta:editing-cycles>
    <meta:document-statistic meta:table-count="1" meta:cell-count="62" meta:object-count="0"/>
  </office:meta>
</office:document-meta>
</file>