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9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www.amazon.de/Robotime-Erwachsene-Modellbausatz-Holzbausatz-Michanisches/dp/B09CCP4L63?__mk_de_DE=%C3%85M%C3%85%C5%BD%C3%95%C3%91&amp;crid=1FVN7FXM9VFXC&amp;dib=eyJ2IjoiMSJ9.k9yLooYThXAzbo57DE-VS9mEzKt2DEWY0lFRAylBE0WV-YtBf03uaFnpsNSFQOiezJxJdLErUflLoH7a3h0va16CW5MfOBmSOk5aIIhqUmLiWzajGZ_ciesCW9PXNs5FhlYETStZWrVDyZtOa1-AMP7MlQuVAh-PDr2YiQN5X79X5Tra-FxwTCq5zI3-qSv1-wiL43wJhEE9--sNPZ7AuoQkasW0vVBMXmfqrzB1cUPKr8YqC3JGr7x-u3Z7c0SuA3FUlSuIGmAdJ9VVupwupJddFvlak0nxlSR7xCuw_SE.8oDu1NBzrSz8neQAAB1e8xip1AUFzHQ_WV4GWYsRMGk&amp;dib_tag=se&amp;keywords=3D%2BHolzpuzzle%2Bmechanisch&amp;qid=1777412283&amp;sprefix=3d%2Bholzpuzzle%2Bmechanisch%2Caps%2C131&amp;sr=8-2-spons&amp;aref=adSO3Qy3K2&amp;sp_csd=d2lkZ2V0TmFtZT1zcF9hdGY&amp;th=1&amp;linkCode=ll2&amp;tag=geeklist-21&amp;linkId=e1b89f41c52817bfd72c23062109d2eb&amp;ref_=as_li_ss_tl</text:p>
          </table:table-cell>
        </table:table-row>
        <table:table-row table:style-name="ro1">
          <table:table-cell office:value-type="string" calcext:value-type="string">
            <text:p>https://www.amazon.de/EYOCEAN-Schreibtischlampe-Fernbediennung-Gestensteuerung-Tageslichtlampe/dp/B0BNDLND3Y?__mk_de_DE=%C3%85M%C3%85%C5%BD%C3%95%C3%91&amp;crid=1Y7Q1043S4YRC&amp;dib=eyJ2IjoiMSJ9.Phvcd5sSpDuSCkMSjgEK3KoQvFYBF9ELEpTmbhJ29Fk7_nr_RvwVm2ezhITQsGHD50IIpEmQHdTRfU-sr5yYImhASbhtctjVKatE782yJUad9QTG9sa4RkVHWA0kns_Sb7V7_KYB0x2nhN6RQRtkArPa5d48n6wC-GBpy2yw82eAOnKdKMxMEpO4hOkKmfhQzu4Dvizo8scc0aQRp8UBm7LIySOvGTrubLk_PS_Ov-LZvMDr01h3Sy6jyvECZDCeyFPOty1nL3ctt-OQ-MLVnx6Ct2M-zOVL9MzzKi3Zx9Y.9K0wVyE4cOR80IwgeSrL5w9dZJn1TN3aXhBHB_h-sdg&amp;dib_tag=se&amp;keywords=8-Bit%2BSchreibtischlampe&amp;qid=1777412378&amp;sprefix=8-bit%2Bschreibtischlampe%2Caps%2C185&amp;sr=8-7&amp;th=1&amp;linkCode=ll2&amp;tag=geeklist-21&amp;linkId=df0b3956693521fde13ffe95550de871&amp;ref_=as_li_ss_tl</text:p>
          </table:table-cell>
        </table:table-row>
        <table:table-row table:style-name="ro1">
          <table:table-cell office:value-type="string" calcext:value-type="string">
            <text:p>https://www.amazon.de/dp/B0CF1R5HPF?ie=UTF8&amp;pd_rd_plhdr=t&amp;aref=gZCNSqYIp3&amp;th=1&amp;linkCode=ll2&amp;tag=geeklist-21&amp;linkId=8ba9f87a7583b0b1ee9eec539f717c64&amp;ref_=as_li_ss_tl</text:p>
          </table:table-cell>
        </table:table-row>
        <table:table-row table:style-name="ro1">
          <table:table-cell office:value-type="string" calcext:value-type="string">
            <text:p>https://www.amazon.de/BTF-LIGHTING-Individuell-adressierbar-Vollfarbiger-DIY-Projekte/dp/B088BPGMXB?dib=eyJ2IjoiMSJ9.THdXdR2mVyzbDlPI1E_g0TWbyC0p8yskqOoIiDgstrn7yI3V6pJB9iDc-OMo-RtYihUJ5csvLgjPbtly6jtcwZHOUFJAVJy8lDnBiWr7HRmQs68GgPOgT8hGhnXRHO2NcZ-KMoLDXvXyVacaRbWVrL6tKyD1wSnPVoDcrIs-rqU-N4Y6R46q5uZdxzd_kCQnrNynuEIxKKKD5N1ztONqhNv8iITHrITIyO-58uEIDlpQv3NYapiIVnQPhrgux3cGRLsKRTEBHZZ7ixVaLf9h4iepkEHHsnavq2g2_-hrLTY.XjkjkYcYjnS4jTtCFI72Xl8Syry2XundSCdgWQXu98k&amp;dib_tag=se&amp;keywords=Addressable%2BLED%2BStrip%2BWS2812B&amp;qid=1777412504&amp;sr=8-6&amp;th=1&amp;linkCode=ll2&amp;tag=geeklist-21&amp;linkId=6e06e09beb2e0868d87403cde2f70039&amp;ref_=as_li_ss_tl</text:p>
          </table:table-cell>
        </table:table-row>
        <table:table-row table:style-name="ro1">
          <table:table-cell office:value-type="string" calcext:value-type="string">
            <text:p>https://www.amazon.de/Grupo-Erik-Sch%C3%BCssel-Keramik-M%C3%BCslischale/dp/B0CK76BL9K?__mk_de_DE=%C3%85M%C3%85%C5%BD%C3%95%C3%91&amp;crid=1A1WA2JNOF5EH&amp;dib=eyJ2IjoiMSJ9.heZK9sFpVES0cKiiIzA-KwaERifBUsXxKj_sd-MVggIDKVO5673ib_Od0-dbgLjFRsA-YoLYmfiuvZGuF9avL5hq64g_mVuVkAdslsf0vU_Wy94H50jwCLl7xT3Rms3bs-oShymRpO8XuSFcSrj504YZ96LVrfTashNDic7CQemp3YUQZyEYIsZMQZZt6hHpvSoWDi0Hg0P6KIShxm87w7-zKKoG-1lwo9K5ISh30CupKIONv9FcxbhXw_rmenWAN-1eo9g3wzV6-v06HM7Oy8QxUbxzTMhO9xIFxuPK8sY.e7_ojSchiz9kcLztkCr-0FnA7r64vHjb_J7YVum20Ng&amp;dib_tag=se&amp;keywords=Anime-Style%2BRamen%2BBowl%2Bgenerisch&amp;qid=1777412588&amp;sprefix=anime-style%2Bramen%2Bbowl%2Bgenerisch%2Caps%2C127&amp;sr=8-8&amp;th=1&amp;linkCode=ll2&amp;tag=geeklist-21&amp;linkId=6796d7eefc9a3dffed61de70df9bfbb2&amp;ref_=as_li_ss_tl</text:p>
          </table:table-cell>
        </table:table-row>
        <table:table-row table:style-name="ro1">
          <table:table-cell office:value-type="string" calcext:value-type="string">
            <text:p>https://www.amazon.de/Nintendo-Game-Spardose-Super-Mario/dp/B06X6KHF5H?__mk_de_DE=%C3%85M%C3%85%C5%BD%C3%95%C3%91&amp;crid=2YGBT3VBEZHAK&amp;dib=eyJ2IjoiMSJ9.0IDWc8FliFUbeyyELKSRYv0RflCKViwAXEql0EhV-pwh-E7DnwNUIbW96OVC3TX0_Yk9oy38IthGwjSglhmC7JiyyDEuqU_gKIxr0trKPKdpEx6JXzd4KjOBf7OG4idC2eAxIfDcTdbvOwJB_I10BYSCTNIRU8UQ4mxEF5WVwVXCLIhP1SKEHlRO9BAMsFANjdg5BPyPmSscs-S_LlzmQIQm7TBTG3TKsLAMH0cnr8TFEOrdU6z3_k7iNL9DYKmfnVqu02wKXXDgFfhkO_T-xc-8y-anBw86BsoN2WvJVm8.LjpIZAHMTC4ebrzFX-6ggNaF2vsnapK3U8BeKAHM5WA&amp;dib_tag=se&amp;keywords=Arcade%2BM%C3%BCnzfach%2BDeko%2B%2F%2BSpardose&amp;qid=1777412656&amp;sprefix=arcade%2Bm%C3%BCnzfach%2Bdeko%2B%2F%2Bspardose%2Caps%2C149&amp;sr=8-4&amp;th=1&amp;linkCode=ll2&amp;tag=geeklist-21&amp;linkId=9ce208636d1239498c955112cf153ce8&amp;ref_=as_li_ss_tl</text:p>
          </table:table-cell>
        </table:table-row>
        <table:table-row table:style-name="ro1">
          <table:table-cell office:value-type="string" calcext:value-type="string">
            <text:p>https://www.amazon.de/Mlikero-Sammelkarten-Aufbewahrungsbox-Magnetische-kompatiblen-Kartenteilern/dp/B0CL7J9NN1?__mk_de_DE=%C3%85M%C3%85%C5%BD%C3%95%C3%91&amp;crid=1UJMLZ4NAOH88&amp;dib=eyJ2IjoiMSJ9.1DYe4jjDvjkix5lZs8gkL1byC4XiCGrG45lJymzZmmaPKHF6PFDRI4DNHEtV3rd-1G0fdaJgdrE_D0Fpij3uV_u7N9CFjpSQcWiLu_AtT72i6lzNBfmQk_NApoNzEgo9hEvmydP8ZANHnPWhsvSund0pHAoBq-ZIc6n2knIlL8nlfTNv3ix-DbpUPjk08PXduFfpv5pmtNW7XZWsD13s2hGILuG6qlXHU9axcJNs9kgdzSX47bauI7LR1HXlt6tPmBYEMVpp2NUwDURgzzS_HJaVo_Y28QY4mH3ByHe0QMs.f6yU87gPuC2oOmk_UTJttfC3kU7MYOw55_PRNNp-Y0M&amp;dib_tag=se&amp;keywords=Archival%2BStorage%2BBox&amp;qid=1777412703&amp;sprefix=archival%2Bstorage%2Bbox%2Caps%2C132&amp;sr=8-3-spons&amp;aref=G8gxndcjnD&amp;sp_csd=d2lkZ2V0TmFtZT1zcF9hdGY&amp;th=1&amp;linkCode=ll2&amp;tag=geeklist-21&amp;linkId=44dc07685e21c183140ca4f04550d813&amp;ref_=as_li_ss_tl</text:p>
          </table:table-cell>
        </table:table-row>
        <table:table-row table:style-name="ro1">
          <table:table-cell office:value-type="string" calcext:value-type="string">
            <text:p>https://www.amazon.de/SLOCME-Baby-Groot-Blumentopf-Schreibtisch-Ornament/dp/B08CGJHZW1?__mk_de_DE=%C3%85M%C3%85%C5%BD%C3%95%C3%91&amp;crid=FVME7IBYUO7H&amp;dib=eyJ2IjoiMSJ9.XMvWc8qkkAVHksiiK48Kd_jLLWkqc_Y0QML5vU02PPl7MJ1IuEgE5Z7EI-An1gqfSwzE1cEOGXo5Of_C_7cpw_jBGoyKfKgIsCKbl8HSktxSrJLQJzrQerDN6Vl0FvA6BbJqi9c2Svg7lmY0qTyRCCuYcWTUu1RrxMp4Y-Jd_oVUfjAWFsLa9EXEbZS68dkg3F-6-uTwf42zwfLUoCZuvePgWU9ocnc3L7yArGr3XMLijh93bUcKrHASHz-xd_xadCCa1qWPfyX1_yU87RXrHsrICbrs9T__-UrqQT5yUUc.d2lZqwUHqIF4TyfEj6UiUsOdumaad5rWkVke6odCeTQ&amp;dib_tag=se&amp;keywords=Astronaut+Blumentopf&amp;qid=1777412766&amp;sprefix=astronaut+blumentopf%2Caps%2C133&amp;sr=8-21-spons&amp;aref=1oQrftS5QK&amp;sp_csd=d2lkZ2V0TmFtZT1zcF9tdGY&amp;psc=1&amp;linkCode=ll2&amp;tag=geeklist-21&amp;linkId=9b5cb362d13d5428c320d74b10ce681e&amp;ref_=as_li_ss_tl</text:p>
          </table:table-cell>
        </table:table-row>
        <table:table-row table:style-name="ro1">
          <table:table-cell office:value-type="string" calcext:value-type="string">
            <text:p>https://www.amazon.de/Macchiatto-Sternenhimmel-Fernbedienung-Erwachsene-Schlafzimmer/dp/B0D7ZYLZQC?__mk_de_DE=%C3%85M%C3%85%C5%BD%C3%95%C3%91&amp;crid=DBIFAMZYP9XT&amp;dib=eyJ2IjoiMSJ9.N-Cyqf_zeJU4Q0U7LAiTBRJ6AibQIwqFnTKrzNvok8PgBUAzzRKCZEcv3gTSfrGQormzWXzbI3rnXBNOAvE64FbiQ_9VSZ5MTktjVauyVEQc__BrhTfbjBem9-GX6UcHRhDV9VAcvIDQERrgx9T9SfuoESAuaV2EVQ6yydWg8QoHnxHLCNzDYrc4DAUhc5uA17yHf07fa2KedSoZ7ySXZX4pfIs7HkIJE80bWcK9atCbsKxzvIiI-DDOGDe_NbjlhnCxUJraYN69kwIGPx5n-KrOobuuO4MEFD52_W9oBD0.sdPryD3NjttBlm8x4169Oqvqih-wgbchI5KEsXD4Gf4&amp;dib_tag=se&amp;keywords=Astronaut+Nachtlicht&amp;qid=1777412843&amp;sprefix=astronaut+nachtlicht%2Caps%2C139&amp;sr=8-3-spons&amp;aref=tkaQCfpdFa&amp;sp_csd=d2lkZ2V0TmFtZT1zcF9hdGY&amp;psc=1&amp;linkCode=ll2&amp;tag=geeklist-21&amp;linkId=4d6ee7306b59605c373207205ce3f386&amp;ref_=as_li_ss_tl</text:p>
          </table:table-cell>
        </table:table-row>
        <table:table-row table:style-name="ro1">
          <table:table-cell office:value-type="string" calcext:value-type="string">
            <text:p>https://www.amazon.de/AKOZLIN-Miniaturen-Aufbewahrungskoffer-Miniaturen-Transportkoffer-Aluminiumrahmen-M-13-5%C3%9710-6%C3%9715-7/dp/B0DMSVWLD2?__mk_de_DE=%C3%85M%C3%85%C5%BD%C3%95%C3%91&amp;crid=ZZ9VJGYR658S&amp;dib=eyJ2IjoiMSJ9.syUF1-0RwMrzd6_d_RAKvezWQAOVB6RIeXLxbeaH8B1MiF3W4JNnLMzbog7zBk3buUZW3e-GCDRzY-HmrGPVYAUxc2y4NOvxKiqopVNdQaPQRpiIB4lVqRxS3NqwNBZAm1GrUcr_46aH8kC4uY-kTjM_QMe3rJoW9KcHp9ZCj72YWVe-KqrTbnZ9AvZLi253MgiJ3yriyWZL4xzZk30HQRxqZItFt1D6NJnT7vVcLHkuapIo9sigIUDxh_owkbLIFCoppLztQY6Cl8GGgHo99rxwLMie2RdgOErzTR8dr1s.Sev2G3rw9clCB8en6kvE_CTi3Edrr5MqaAudQPAzHmU&amp;dib_tag=se&amp;keywords=Aufbewahrungsbox%2Bf%C3%BCr%2BMiniaturen&amp;qid=1777412893&amp;sprefix=aufbewahrungsbox%2Bf%C3%BCr%2Bminiaturen%2Caps%2C151&amp;sr=8-6&amp;th=1&amp;linkCode=ll2&amp;tag=geeklist-21&amp;linkId=592556e1f96309a8140a252128326432&amp;ref_=as_li_ss_tl</text:p>
          </table:table-cell>
        </table:table-row>
        <table:table-row table:style-name="ro1">
          <table:table-cell office:value-type="string" calcext:value-type="string">
            <text:p>https://www.amazon.de/Bugucat-Auslaufsicher-Erwachsene-Fr%C3%BChst%C3%BCcksbox-Vesperdose/dp/B0CSY763N5?__mk_de_DE=%C3%85M%C3%85%C5%BD%C3%95%C3%91&amp;content-id=amzn1.sym.5f267933-ba07-42a4-875f-86ee9042299d%3Aamzn1.sym.5f267933-ba07-42a4-875f-86ee9042299d&amp;crid=1H6GWP61YN4PQ&amp;cv_ct_cx=Bento%2BBox%2BKawaii&amp;keywords=Bento%2BBox%2BKawaii&amp;pd_rd_i=B0CSY763N5&amp;pd_rd_r=4bada8ca-3dd2-4853-bd95-9dcfbc90eb6c&amp;pd_rd_w=9wPfS&amp;pd_rd_wg=3dmAC&amp;pf_rd_p=5f267933-ba07-42a4-875f-86ee9042299d&amp;pf_rd_r=YFNPPXRSJ2F7XG49GZTF&amp;qid=1777412943&amp;sbo=RZvfv%2F%2FHxDF%2BO5021pAnSA%3D%3D&amp;sprefix=bento%2Bbox%2Bkawaii%2Caps%2C181&amp;sr=1-1-c5cf13e1-5a2b-43a3-b397-d15edbd6d76f-spons&amp;aref=W22Tpdu3ny&amp;sp_csd=d2lkZ2V0TmFtZT1zcF9zZWFyY2hfdGhlbWF0aWM&amp;th=1&amp;linkCode=ll2&amp;tag=geeklist-21&amp;linkId=beaec5500bcda32c7dce7681c737d659&amp;ref_=as_li_ss_tl</text:p>
          </table:table-cell>
        </table:table-row>
        <table:table-row table:style-name="ro1">
          <table:table-cell office:value-type="string" calcext:value-type="string">
            <text:p>https://www.amazon.de/Katie-Suppenkelle-OTOTO-Katzenk%C3%BCchenzubeh%C3%B6r-Katzenliebhaber/dp/B0C1H2RDZG?__mk_de_DE=%C3%85M%C3%85%C5%BD%C3%95%C3%91&amp;crid=1H6GWP61YN4PQ&amp;dib=eyJ2IjoiMSJ9.xoZFqbOu_KEF9wPoOPFRFKy400pdjOTzB1f5x6Je2NOoQyjGt8_X1GvG-FEb4iTAXI8Xhdu5mDVZm2kSFATBquKNjQPs7IakA-C5cxYgOtBT4vXcRg1tZBD0XgPmPA5ogNW4WXxMJfEn1FLYqVtJr90SUKZIoEc7zkF2VpVOL1XwcuLfUmPcbKGMwWjM4_5WfKreFCX9u3q2W_aUbdR2JPNA4Bh3_9oj1c_5bckZribfERaygQb3LW-t2ieSHK_cjaGA5ShrfT84zz4Slz4frnn6Soi9Aty8MPTjyZSeJqA.MxcsV10K5rGHvUoHdIygCkQKiNv3_DPx8tKXPmSZDlM&amp;dib_tag=se&amp;keywords=Bento%2BBox%2BKawaii&amp;qid=1777412943&amp;sprefix=bento%2Bbox%2Bkawaii%2Caps%2C181&amp;sr=8-51&amp;th=1&amp;linkCode=ll2&amp;tag=geeklist-21&amp;linkId=a7a7a15030dedbce8afafb51947b11da&amp;ref_=as_li_ss_tl</text:p>
          </table:table-cell>
        </table:table-row>
        <table:table-row table:style-name="ro1">
          <table:table-cell office:value-type="string" calcext:value-type="string">
            <text:p>https://www.amazon.de/Brettspiel-wasserdichte-Enthusiasten-Spielmatten-Obliterator/dp/B0D3QGVCKD?dib=eyJ2IjoiMSJ9.YG6Tgzv7lkcLJ3x6YgAOmqqcUAWKyFIQpnJBlaxFfQp5HlQTksKf9z0pWu8SiSfBeUDqvg8vw17tBA_6I61uN4dBam63JN3mrzhmNgRqS42PP-LqLjtWbrdsQ8Ewf54mDc2N3HM1-OUNqF_Nlc9zvpxbRc-gbVVgU6l0Sf_vlcUbrLCBdPVoJfqDwhYcdRp2vKa7yhUkTr47EFHoAoDfBcg-Z1RqQsW9TEE9saFXO7bYi5PCUfETRUaIH5qykqBs1J0fAbVdd8-OAEv-hbX93h5EXkgHn_Y-zFKcc791cuw.yNYdw33rA8zGZY-N1YlcG2LJiaR0g9DMgTVhX5Df9zk&amp;dib_tag=se&amp;keywords=Brettspiel%2BTischmatte%2BNeopren&amp;qid=1777413175&amp;sr=8-1-spons&amp;aref=1n54mAv1dg&amp;sp_csd=d2lkZ2V0TmFtZT1zcF9hdGY&amp;th=1&amp;linkCode=ll2&amp;tag=geeklist-21&amp;linkId=e6820e420c757557a6c3a8661ae69aa8&amp;ref_=as_li_ss_tl</text:p>
          </table:table-cell>
        </table:table-row>
        <table:table-row table:style-name="ro1">
          <table:table-cell office:value-type="string" calcext:value-type="string">
            <text:p>https://www.amazon.de/Mozzaic-Puzzlematte-1500-Teile-Puzzleunterlage/dp/B0FHV6CHG5?dib=eyJ2IjoiMSJ9.YG6Tgzv7lkcLJ3x6YgAOmqqcUAWKyFIQpnJBlaxFfQp5HlQTksKf9z0pWu8SiSfBeUDqvg8vw17tBA_6I61uN4dBam63JN3mrzhmNgRqS42PP-LqLjtWbrdsQ8Ewf54mDc2N3HM1-OUNqF_Nlc9zvpxbRc-gbVVgU6l0Sf_vlcUbrLCBdPVoJfqDwhYcdRp2vKa7yhUkTr47EFHoAoDfBcg-Z1RqQsW9TEE9saFXO7bYi5PCUfETRUaIH5qykqBs1J0fAbVdd8-OAEv-hbX93h5EXkgHn_Y-zFKcc791cuw.yNYdw33rA8zGZY-N1YlcG2LJiaR0g9DMgTVhX5Df9zk&amp;dib_tag=se&amp;keywords=Brettspiel%2BTischmatte%2BNeopren&amp;qid=1777413175&amp;sr=8-23-spons&amp;aref=Ym0XHsiWBZ&amp;sp_csd=d2lkZ2V0TmFtZT1zcF9tdGY&amp;th=1&amp;linkCode=ll2&amp;tag=geeklist-21&amp;linkId=194b4316bf960ba2fe32925fcdafebb5&amp;ref_=as_li_ss_tl</text:p>
          </table:table-cell>
        </table:table-row>
        <table:table-row table:style-name="ro1">
          <table:table-cell office:value-type="string" calcext:value-type="string">
            <text:p>https://www.amazon.de/AeroPress-Reise-Kaffeezubereiter-Set-Vollmundiger-Kaffeemaschine/dp/B07YVL8SF3?__mk_de_DE=%C3%85M%C3%85%C5%BD%C3%95%C3%91&amp;crid=75KTGNTAI3BH&amp;dib=eyJ2IjoiMSJ9.qhwBB9HKwJ8Dn3bF6aucEoJPUcBkkKSUWVoqtBuWVwKhSwuFCE0hTTN6_g8vJqP9QYQ-PEs80HmMqoj_Kc3Iy8UaOg1-YUgYUpkr2xUxLmmTHFEIaWP3W19mRFbwKSiHL44rMEDoTYdInp0r0GyuCpJDigodIRmuZ88f3GVUrj-lWr9A-VfLtcef6z06Ef2WZj77WxkiagciFnbA0g7QfYKjNg9LcsYo_b_JB1zitfQ.kCB_RxY2WFd-f4irk6CByzK3qOJmYCCD2HegG2lPIV4&amp;dib_tag=se&amp;keywords=Camping%2BKaffeezubereiter&amp;qid=1777413297&amp;sprefix=camping%2Bkaffeezubereiter%2Caps%2C157&amp;sr=8-1-spons&amp;aref=TDAzpsF22f&amp;sp_csd=d2lkZ2V0TmFtZT1zcF9hdGY&amp;th=1&amp;linkCode=ll2&amp;tag=geeklist-21&amp;linkId=23dd8689236bc3ee5db30abe165cc63e&amp;ref_=as_li_ss_tl</text:p>
          </table:table-cell>
        </table:table-row>
        <table:table-row table:style-name="ro1">
          <table:table-cell office:value-type="string" calcext:value-type="string">
            <text:p>https://www.amazon.de/gp/aw/d/B09W62FR1K?_encoding=UTF8&amp;pd_rd_plhdr=t&amp;aaxitk=bc87057ba63bfb611faa38b0a57ff837&amp;hsa_cr_id=0&amp;qid=1777413331&amp;sr=1-1-fd947bf3-57d2-4cc9-939d-2805f92cef28&amp;aref=ZWb653BSxW&amp;pd_rd_w=mu15a&amp;content-id=amzn1.sym.6eae6e96-e4fe-4ff0-8608-0b1f879bacff%3Aamzn1.sym.6eae6e96-e4fe-4ff0-8608-0b1f879bacff&amp;pf_rd_p=6eae6e96-e4fe-4ff0-8608-0b1f879bacff&amp;pf_rd_r=QGYQRK2C8R4EK9BPRRYC&amp;pd_rd_wg=CR7bn&amp;pd_rd_r=e33dcb95-5dcf-4503-8bc6-835cdc1b61a9&amp;th=1&amp;linkCode=ll2&amp;tag=geeklist-21&amp;linkId=0e2d3aed3d27964ad64d405b4fdd7593&amp;ref_=as_li_ss_tl</text:p>
          </table:table-cell>
        </table:table-row>
        <table:table-row table:style-name="ro1">
          <table:table-cell office:value-type="string" calcext:value-type="string">
            <text:p>https://www.amazon.de/MAMBASNAKE-Tastaturkabel-Mechanische-Luftfahrtstecker-Computer-Wei%C3%9F/dp/B0B4W7C573?dib=eyJ2IjoiMSJ9.yVn447rLMibt3NVRj3sYvjdJmd2p4xDlGG3zH9699qJDB-Herj1hD2ULmgLUGSCG810DsYyMy-N3nMGiudmNIyxzmnYOFcJmro26i5eY8a7ncoso5w5GX3ff2N-O8-0-pQuA25-kzbbEZtnBfIS66QgiGViBWng0OXnjNZ3hBUQ--XHjY_J9I32Ose7058eEsAKe-MHla446NU2XBPHFlNwEZQBF4mcTH5AdChn9BT4.uNhEcUmkWE8fqJwVCzepUb7VHPTWqFpfD4e2icWWKlA&amp;dib_tag=se&amp;keywords=Coiled%2BUSB-C%2BKabel%2Bf%C3%BCr%2BTastatur&amp;qid=1777413367&amp;sr=8-4&amp;th=1&amp;linkCode=ll2&amp;tag=geeklist-21&amp;linkId=c9a47f6d939d390e5667f16408527e20&amp;ref_=as_li_ss_tl</text:p>
          </table:table-cell>
        </table:table-row>
        <table:table-row table:style-name="ro1">
          <table:table-cell office:value-type="string" calcext:value-type="string">
            <text:p>https://www.amazon.de/Ultimate-Guard-UGD020005-Backing-Current/dp/B00FTFAITE?__mk_de_DE=%C3%85M%C3%85%C5%BD%C3%95%C3%91&amp;crid=337T8GSKO3SOI&amp;dib=eyJ2IjoiMSJ9.9w-6_VuYIgQ9tVTRpI07sypFS26UlWXQyiHhuF4KnjNxMIaldV3W3WJcUesDFIgkuwIOqzh2djf5lcbJXCVAugAyaYSdVMzkYWQc_QHCEEOaDmJBmcs7QMiYUiF8UChEvlexz4QixTjNOi7hwSy3-w4ahGAFXyS52WCTVDo8D7IdfJ2xfFGXEBROd8YF273C6fEGoIggybGmYKCzBmojsiCh4P2IFA4xcsEwuIw6y2Z1Kk2TakMVTJPjnlwlybyYMcIKgbu1mBlVCy2z7DaIKA0fRDEtjeK2B0fWxrUuO1k.p3twO4Qg9acf2IzDWbcjAPMkU_sH4K_yCOZSjYeVmhw&amp;dib_tag=se&amp;keywords=Comic%2BStorage%2BSleeves&amp;qid=1777413466&amp;sprefix=comic%2Bstorage%2Bsleeves%2Caps%2C145&amp;sr=8-6&amp;th=1&amp;linkCode=ll2&amp;tag=geeklist-21&amp;linkId=2b315bd6060329f427619249761f0426&amp;ref_=as_li_ss_tl</text:p>
          </table:table-cell>
        </table:table-row>
        <table:table-row table:style-name="ro1">
          <table:table-cell office:value-type="string" calcext:value-type="string">
            <text:p>https://www.amazon.de/LEAP-Schachuhr-verbesserter-Countdown-Funktion-Brettspiele/dp/B0C6JNZ9MW?__mk_de_DE=%C3%85M%C3%85%C5%BD%C3%95%C3%91&amp;crid=2GC91155LM0LR&amp;dib=eyJ2IjoiMSJ9.EZmL1zR3-p-kCdmGwhDrkSlZi0NwfD4vADdqE_WgOtt6otLT7aUCxLthPSXoNdacZRoz9HP3UUn4j5wINuS6QQEztkYntiaxgPy4mPp7WcKS4wK2lvgrKqgaoPeRLI48gY2BBpYIpyyY06kXM4THFAsr0Dre7wAVmusiBv8f9NT8cV6kEIPWvZhzhc0LRPgeLZQwEatHM7f5NV6h2baxGAvPqc7yP2N1YnDQpBGf6OKo_A5YEnskE2Q7MbN_dMbP0NeNW-gM4PjJpToNWf7jF7zXRrNV_GJWeNFQ6QAccMA.5a5iRRVLFVo_pcmH671OZiYGxeGb-xTXGFtX58tNTao&amp;dib_tag=se&amp;keywords=Digitale%2BSchachuhr&amp;qid=1777414227&amp;sprefix=digitale%2Bschachuhr%2Caps%2C127&amp;sr=8-1-spons&amp;aref=AFWoz4itLX&amp;sp_csd=d2lkZ2V0TmFtZT1zcF9hdGY&amp;th=1&amp;linkCode=ll2&amp;tag=geeklist-21&amp;linkId=0309fecee1b52990105fb05f536309f9&amp;ref_=as_li_ss_tl</text:p>
          </table:table-cell>
        </table:table-row>
        <table:table-row table:style-name="ro1">
          <table:table-cell office:value-type="string" calcext:value-type="string">
            <text:p>https://www.amazon.de/Kynup-Messschieber-Schieblehre-Messwerkzeuge-ausgeschaltet/dp/B0DCFT4B65?__mk_de_DE=%C3%85M%C3%85%C5%BD%C3%95%C3%91&amp;crid=1ZND9PG883YC9&amp;dib=eyJ2IjoiMSJ9.PFQliHk9cbBV8BIQsFur2oxTAv_-rSS_1zLOrtYSs0U4g87alxYA3ZopFg9sGaSnK4A8_tJseP8NkHjcf7mxSTSAksk1_aupskuACF2ay5FdLSUYxRcbtOIqawz60A2KsABpyOpjvoRkZUtl64vrHWLycpwZ-Vl-_1N1cpBYU47Q5-uR9UPkqwRbgoFHMPPxOiI2ngU_-zNnE9gs55RgNYDYypogGsgG9E1R3wX8xfeKy0L7Q3RDUKF_eHfkT28NX-oPSdDFRvKpUoUE3Q8F8oXrISJk_V-3RpRqS4jYVwU.nBahq3_sl9DrR3T8NIABYU_7Tq5Td2i5wLWIOYS5y5A&amp;dib_tag=se&amp;keywords=Digitaler%2BMessschieber&amp;qid=1777414266&amp;sprefix=digitaler%2Bmessschieber%2Caps%2C184&amp;sr=8-3-spons&amp;aref=Mnr5G5LK4m&amp;sp_csd=d2lkZ2V0TmFtZT1zcF9hdGY&amp;th=1&amp;linkCode=ll2&amp;tag=geeklist-21&amp;linkId=b1ed5ce66cec2e69bc84d3145b8b596e&amp;ref_=as_li_ss_tl</text:p>
          </table:table-cell>
        </table:table-row>
        <table:table-row table:style-name="ro1">
          <table:table-cell office:value-type="string" calcext:value-type="string">
            <text:p>https://www.amazon.de/Nina-Ottosson-Leckerli-Spender-Gehirn-Bewegung/dp/B082748C86?__mk_de_DE=%C3%85M%C3%85%C5%BD%C3%95%C3%91&amp;crid=2MHAT9R51BRG2&amp;dib=eyJ2IjoiMSJ9.ZyXsOo3ERtyxHovXPcc6f25R-ailKeWig6gJGymIbrc_GxozxSQEhDPM1uQK4kcTDYFX627817XLY-hTszYx6akkE_VuaN1fxXBm46ANNLDfH7aOeprWTsZ_BAVQ6vtJw6IVZ48axNp-vjXdu2oMc2YKBfB9wKZBGnTV2bAwXgGf2hI961Ci7yDMFlvKgZ1GaJPf5-yBsh-IiyqIl4CdyqM67dre_FuOJLaCblF1M3XyUbFAB5WyFTZwWMwLGkG16naDPwaYfsVzzxhxtu_nR0eEwcCwQpr-02uxaQ6bKvg.U-M1SvuO9E_Cyn2NtYYzg8PuJtEFsnL7yIDMXsTuMDs&amp;dib_tag=se&amp;keywords=Dog%2BPuzzle%2BToy%2BLevel%2B2&amp;qid=1777414337&amp;sprefix=dog%2Bpuzzle%2Btoy%2Blevel%2B2%2Caps%2C119&amp;sr=8-8&amp;th=1&amp;linkCode=ll2&amp;tag=geeklist-21&amp;linkId=563d92d23cc497218f8ab5a0c0176d34&amp;ref_=as_li_ss_tl</text:p>
          </table:table-cell>
        </table:table-row>
        <table:table-row table:style-name="ro1">
          <table:table-cell office:value-type="string" calcext:value-type="string">
            <text:p>https://www.amazon.de/Lamicall-Dry-Bag-wasserdichte-Tasche/dp/B0F1T1L4RF?__mk_de_DE=%C3%85M%C3%85%C5%BD%C3%95%C3%91&amp;crid=2EJ550DOJYBM0&amp;dib=eyJ2IjoiMSJ9.fM84rSBlHLznew1bUcv6sRB2cdhfOM12IiQPwqdqev97utSQcHdYWk4ZAxkYXwKx9HwA26gSuKoBoJsKxIUglPXWysOpBTpR48pA1c0Z9x-X7lk9-JlatR4EXHmuCHZ74U5jLsNBJ3TLGcba3O0qFswIgiRkQyS03FSUpXqTlFxnY4iuxrW8sZjUOnxFMFoafspBAnrUUsk2uqa_Cc_cnDoaFNGKSrz0oSph3H_hzQx91WoYgPbCd1bhh8wlfal7rhpb71dAn0eggbX9gdjfl33zMAISBs3wk4NJt5NrpvI.dPomhfqKL_wBBFuach86FZF_Ru3YgUMG3wY4Syb_lkQ&amp;dib_tag=se&amp;keywords=Dry%2BBag%2Bwasserdicht&amp;qid=1777414421&amp;sprefix=dry%2Bbag%2Bwasserdicht%2Caps%2C164&amp;sr=8-1&amp;th=1&amp;linkCode=ll2&amp;tag=geeklist-21&amp;linkId=e874f59b03ad39419e70daec56ea2c2d&amp;ref_=as_li_ss_tl</text:p>
          </table:table-cell>
        </table:table-row>
        <table:table-row table:style-name="ro1">
          <table:table-cell office:value-type="string" calcext:value-type="string">
            <text:p>https://www.amazon.de/Trymaker-Spielleiterschirm-Sichtschirm-Regel-Referenzkarten-Aufbewahrungsh%C3%BClle/dp/B0FMXXB8HS?__mk_de_DE=%C3%85M%C3%85%C5%BD%C3%95%C3%91&amp;crid=1YACLHT25SEZ5&amp;dib=eyJ2IjoiMSJ9.BDp0C2i92T25khFXhIdLf4pwUA-aU6zyh8nZCuplLv36laMeg2np-S-O-LWb_YElMMxgZaMMRT95JRJlOAkpDfbMudr2Wd6ecoKPupniigYBFLe-wFPyPZPXSLtPJBhjCFjmXCL6Zc389_Mano-mfP5oPU1K2trYDCl9Kvle-8c1AGoss1VfDH2pRiRDNXVepc7fP7AxezbsMszdiWPYOBGy3htwxhfmV4IrYqmLgGQhVpoPhsxb6x3KOXW8tTJi-V57RCrRDbyD5biaF6jPBc_3Rt2BVLfrpZoY45W_GEQ.6xbw0xn5CBUJPXcGVNGZFhJt2Hl2NDZxVs13PHYWFc0&amp;dib_tag=se&amp;keywords=Dungeon+Master+Screen+generisch&amp;qid=1777414468&amp;sprefix=dungeon+master+screen+generisch%2Caps%2C141&amp;sr=8-4-spons&amp;aref=MVnxVk133z&amp;sp_csd=d2lkZ2V0TmFtZT1zcF9hdGY&amp;psc=1&amp;linkCode=ll2&amp;tag=geeklist-21&amp;linkId=54a16984167cdbb9a3f4124ac618a446&amp;ref_=as_li_ss_tl</text:p>
          </table:table-cell>
        </table:table-row>
        <table:table-row table:style-name="ro1">
          <table:table-cell office:value-type="string" calcext:value-type="string">
            <text:p>https://www.amazon.de/CRIMELAND-Krimispiel-Falkenstein-Feeling-klimaneutral/dp/B09JZYV36J?__mk_de_DE=%C3%85M%C3%85%C5%BD%C3%95%C3%91&amp;crid=39FP1DE65S062&amp;dib=eyJ2IjoiMSJ9.6PROe1-KAPK59tTkqg0xw66-85v2Pjtienmg591f0O7qgc3llblXq1nebagdpebbYb-6rznp6rpx4OIA6HXP9buJcrRmN2xs75WgiOFUAcuZWOrML792S1QdlRVs55Ut1JDG9-DwsZD-reu7_giF2nmej92qzli-Q7W7Feq5PSTdXF83sGRQOqq59QPU9nPoM_wqTyaUqRsMTZ1WTmFt0cEY2eGxphawaiAmvO8KC-qXK8CUVmQLSGfeXySxVwZHg2k28aljM-0aOUlXnmdyJcN_1TlQdsuQAqGOPJiOoyk.ERmbqkmKhHDaFWu6jVvQsWpaN-_vzS-SJ7M7Hqvsc5s&amp;dib_tag=se&amp;keywords=Escape+Room+Box+f%C3%BCr+Zuhause&amp;qid=1777414596&amp;sprefix=escape+room+box+f%C3%BCr+zuhause%2Caps%2C119&amp;sr=8-28&amp;linkCode=ll2&amp;tag=geeklist-21&amp;linkId=9353871a31ce2f7b8a013940d9a9da95&amp;ref_=as_li_ss_tl</text:p>
          </table:table-cell>
        </table:table-row>
        <table:table-row table:style-name="ro1">
          <table:table-cell office:value-type="string" calcext:value-type="string">
            <text:p>https://www.amazon.de/iFixit-Anti-Static-Antistatik-Matte-empfindlicher-Elektronik/dp/B01BLPBOS4?__mk_de_DE=%C3%85M%C3%85%C5%BD%C3%95%C3%91&amp;crid=1TSBF349UDPNG&amp;dib=eyJ2IjoiMSJ9.nIVkURTt_ax8Or954LuE9nZ1uWGPfAoMJItQGJ5K70a0XKsSGD_194anXlHnec58wJWVwS3n-SaDv7J1oox9qqexqC-BMtdqbBYhAOUz_4UbAInl3JMTAv41JUYwYXnfpymjZJUjWpbLLx2LYoPtUX_rmoLdmH4sHjmz-fK0IVR8Mw1NXivtqDAqIoHa9NlES5oLnTu4mRvfTLz8NQiRQgv9NP3BDkGhdtCrE3jxFNE.d1M8Nh7wpEQFWWW2Yh204smntxbaWDyd1H1MxzwlRio&amp;dib_tag=se&amp;keywords=ESD+Matte+f%C3%BCr+Elektronik&amp;qid=1777414704&amp;sprefix=esd+matte+f%C3%BCr+elektronik%2Caps%2C136&amp;sr=8-3-spons&amp;aref=lSRhEd4v6v&amp;sp_csd=d2lkZ2V0TmFtZT1zcF9hdGY&amp;psc=1&amp;linkCode=ll2&amp;tag=geeklist-21&amp;linkId=22a3c410fcab87bfb992ff0eafaf4a31&amp;ref_=as_li_ss_tl</text:p>
          </table:table-cell>
        </table:table-row>
        <table:table-row table:style-name="ro1">
          <table:table-cell office:value-type="string" calcext:value-type="string">
            <text:p>https://www.amazon.de/AZDelivery-ESP32-NodeMCU-gratis-eBook/dp/B07Z83MF5W?__mk_de_DE=%C3%85M%C3%85%C5%BD%C3%95%C3%91&amp;crid=1F3B4VC5GWFU3&amp;dib=eyJ2IjoiMSJ9.wLRADyRoyeR2s6vqHTGry4I1JUbTAr6BmvO170W0MedlcmFCyV_khbe_N06D-QmDX1fkzPmNXYbku8jVT_TQmEEJ3KAadqifq_dZWJLsIljYz7BEeL0EKlPNxL-Axsl7poreChy7CgvbGHJORn3zw-Uwq6yFyCCE3Pns7KuX5Ptg10xNvAf6L9ScnWUYiajepkYF8xPBIIP1XVbNtwdymdcLqJUO9jTMRLF4XzuouWFJ0pO44AmtPaQgyVEN9CloOeljdmnTWiY6yniyIJuzIBKMQ6lDSqygOzb9nmXrGi0.BJsUCkBT8fXG_jHGXK5ImHriXK-TdXCA_On9U5Qv810&amp;dib_tag=se&amp;keywords=ESP32%2BDevelopment%2BBoard&amp;qid=1777414797&amp;sprefix=esp32%2Bdevelopment%2Bboard%2Caps%2C133&amp;sr=8-8&amp;th=1&amp;linkCode=ll2&amp;tag=geeklist-21&amp;linkId=3bb8d1dde33a9879d5761ef9b2a23e2d&amp;ref_=as_li_ss_tl</text:p>
          </table:table-cell>
        </table:table-row>
        <table:table-row table:style-name="ro1">
          <table:table-cell office:value-type="string" calcext:value-type="string">
            <text:p>https://www.amazon.de/W%C3%BCrfelbretter-Doppelseitig-W%C3%BCrfelbrett-W%C3%BCrfeltablett-W%C3%BCrfelteller/dp/B0D2W6HGX3?__mk_de_DE=%C3%85M%C3%85%C5%BD%C3%95%C3%91&amp;crid=3N45HA2O7BTMV&amp;dib=eyJ2IjoiMSJ9.xg6vxec0bmX3M3OBtBBQ6Nl6ki0kLcErLp7x5lTBQiOAYThuga3cPVlaoFzGC3olGMfgcNVXOQESwrtpU50uVCmZbNx0CYReyIYqc2V7H0O0guJq4V81ls1cmeDfk7NArFljt-_-JXzZFfYg_Qsjwohrqiu_DuL7CBDIEANJgL6aWosNFA0rPVvrhGxcciFBb9vOZBux1C94nLVmEHbdlrIPkdBRfqRkT31-RiIwCFOuHrubvh35q6haG_UR2h4gEl-57C3ARr9wHzCy4cELhMguOsnX1FAvfWBJFyzTgdI.mIwo-7Svg4OFLW-KTTj5hDXlcDXl6TWmDeNWPGF8OJs&amp;dib_tag=se&amp;keywords=Faltbare%2BW%C3%BCrfelschale&amp;qid=1777414894&amp;sprefix=faltbare%2Bw%C3%BCrfelschale%2Caps%2C133&amp;sr=8-2-spons&amp;aref=VnWBIpjYwi&amp;sp_csd=d2lkZ2V0TmFtZT1zcF9hdGY&amp;th=1&amp;linkCode=ll2&amp;tag=geeklist-21&amp;linkId=c844887b4224bc7232a994dc9ef07e30&amp;ref_=as_li_ss_tl</text:p>
          </table:table-cell>
        </table:table-row>
        <table:table-row table:style-name="ro1">
          <table:table-cell office:value-type="string" calcext:value-type="string">
            <text:p>https://www.amazon.de/LAVIEVERT-Schubladen-Abdeckung-Neigungswinkel-Erwachsene/dp/B0D5QZS9H5?__mk_de_DE=%C3%85M%C3%85%C5%BD%C3%95%C3%91&amp;crid=3BMPZ1SXYV1AF&amp;dib=eyJ2IjoiMSJ9.JQkDCA81wo_UZReiN8EFqyzrgWASUYEjThphcF_Tbnm2zrnQDu88y1hZSteQDcN3hD9uO-q4z634xaOmfN_ZMwoFrECCZ0wcbJrAPkWc8V940d8WlC7-K7Qtza___HwMl0asRgdI65pUgIT06EBdanrXp760uGpuKS9DUSw917UFSmNYMPyIvAsa_hHtlvgwHnhLoecXGajz5tsfZISmgN3x7mQIzaKaJZJAZkmZ8DuK_JEHvcVL5kYqMZQr0LbPxAoAnWRt5ehO7nNKdasZW7VUG2afj6xLE_Q_ra8sfzg.b1S-6Gq74OlFyt_u2iFj1QEb56htNcwlMTtl7Jgd_N4&amp;dib_tag=se&amp;keywords=Faltbares+Puzzle+Board&amp;qid=1777414970&amp;sprefix=faltbares+puzzle+board%2Caps%2C143&amp;sr=8-7&amp;linkCode=ll2&amp;tag=geeklist-21&amp;linkId=823f007903aeee3c71d05a270a629aa9&amp;ref_=as_li_ss_tl</text:p>
          </table:table-cell>
        </table:table-row>
        <table:table-row table:style-name="ro1">
          <table:table-cell office:value-type="string" calcext:value-type="string">
            <text:p>https://www.amazon.de/Einhell-Solarpanel-Solarmodul-Akku-Energiestation-USB-C-Kabel/dp/B0FRMBCRYZ?__mk_de_DE=%C3%85M%C3%85%C5%BD%C3%95%C3%91&amp;crid=2DXB67R8T5OA1&amp;dib=eyJ2IjoiMSJ9.lxWWQ5DMqK84YCYlfPaV76mKoYuNMO_LGDLgCN2xTBauxW_sqBLjSN8qYw9vuAmwaY3ExI-113nrvun3Ca7OAuaHebcnx7ITBTsk7HwP8-ZTAyXcTpx33J1aqgftGHu4dh1jjOkGGOi6hJqQkYMPgKctIzhfIHRmuAs96GujRtYfwBCEQcJ1omRi2tqiO6mgJrp4Ymedng55n08jhkYzag_urPZEmPHQP1qEAOgOlzA.24VP26XO0B6JnAP6LOZrD4QaCX-C1sqkH5th8FZnY0o&amp;dib_tag=se&amp;keywords=Faltbares+Solarpanel+USB&amp;qid=1777415068&amp;sprefix=faltbares+solarpanel+usb%2Caps%2C125&amp;sr=8-15-spons&amp;aref=y9bU9UT7iU&amp;sp_csd=d2lkZ2V0TmFtZT1zcF9tdGY&amp;psc=1&amp;linkCode=ll2&amp;tag=geeklist-21&amp;linkId=ad36a0c42136dc34a7ace5a3377642e2&amp;ref_=as_li_ss_tl</text:p>
          </table:table-cell>
        </table:table-row>
        <table:table-row table:style-name="ro1">
          <table:table-cell office:value-type="string" calcext:value-type="string">
            <text:p>https://www.amazon.de/craspire-Buchumschl%C3%A4ge-Taschenb%C3%BCcher-Rei%C3%9Fverschluss-Buchliebhaber/dp/B0DKBDCPFX?__mk_de_DE=%C3%85M%C3%85%C5%BD%C3%95%C3%91&amp;crid=1XING0Y0IXQL2&amp;dib=eyJ2IjoiMSJ9.qz7vV-l8EqDd2OELXHAmCD_6iBNZDHpf7JdCxdMXYgpvhRpD1bzPHCcZnCshqYQpZwAC1l8tPoHONWrP07g4RFlATB1HYkbioUVpM6EAWqckX3AarEMhCxKnrJuwJX6lCHrfB2bstNlfQrvOJfjiBTqL-UCvujnQym0totwwdDGyCvs5Gs6qiUMC49AMzEkaGInGUjK89KI1wRIin_JbuzBaOGBhB53Qti8GO_s_pz48oNaKhQVUj6RNjPQHTgpi-WnCMweCi7tCOy-sxlVWI2yz0eRls9vO4ThcWFn8vO4.K94_9D-0vYl-h_pORfZiotvXpQi5oDoV2RdG5WKMMGQ&amp;dib_tag=se&amp;keywords=Fantasy%2BBook%2BSleeve&amp;qid=1777415139&amp;sprefix=fantasy%2Bbook%2Bsleeve%2Caps%2C123&amp;sr=8-21&amp;th=1&amp;linkCode=ll2&amp;tag=geeklist-21&amp;linkId=10d20e1dea186d9e6032210776001500&amp;ref_=as_li_ss_tl</text:p>
          </table:table-cell>
        </table:table-row>
        <table:table-row table:style-name="ro1">
          <table:table-cell office:value-type="string" calcext:value-type="string">
            <text:p>https://www.amazon.de/YOOPAI-Filament-Aufbewahrungsbox-Versiegelung-Trockenmittel/dp/B0F8B8C9Q6?__mk_de_DE=%C3%85M%C3%85%C5%BD%C3%95%C3%91&amp;crid=353JL9ZCVUB63&amp;dib=eyJ2IjoiMSJ9.yUXxGxpHEcmn90EV4oYHpyRRi6rRrLjq1rPHFiMaWhvcqK0aJ9EedS2ZcgQA1tTAcm7gsaCsEj9ljmwIMooaVF7-YWBrlHq4K-OCXzsP640ZfzW8f1Ehap9HM3g1uUue0mu5u9ur2_zFmlsSeKE1uF3FRk8mR6JmtFdZeOg71yLblZB4PYGr_KaneiWuqm30i1TveJj0_waIH_5wozkRXOKn9XrOw5D77QeA6VeC-nIIOvCqcosJWFKVVjDZQBYIx4Aa37nkoQ1C9SIaRV5ThshAf9JfqBNmWzVT_zpApuE.1NdVz7vvBmV_ldx1_gy5tBDUoXz3U08iPUFbaptMm1k&amp;dib_tag=se&amp;keywords=Filament%2BTrockenbox&amp;qid=1777415208&amp;sprefix=filament%2Btrockenbox%2Caps%2C137&amp;sr=8-3-spons&amp;aref=Mfy1RNg4GO&amp;sp_csd=d2lkZ2V0TmFtZT1zcF9hdGY&amp;th=1&amp;linkCode=ll2&amp;tag=geeklist-21&amp;linkId=902f9d926eb7e9250ce0fdf6d2e6bf16&amp;ref_=as_li_ss_tl</text:p>
          </table:table-cell>
        </table:table-row>
        <table:table-row table:style-name="ro1">
          <table:table-cell office:value-type="string" calcext:value-type="string">
            <text:p>https://www.amazon.de/MeYuxg-Landschaft-Unterwasser-Dekoration-Kunststoff/dp/B0CDXC3J4Y?__mk_de_DE=%C3%85M%C3%85%C5%BD%C3%95%C3%91&amp;crid=2IMO0EXCD0PJB&amp;dib=eyJ2IjoiMSJ9.Yt_dH-x5M0tCQ4u4_GuKl7sX2fgvTaZHKWmkWXiDSZ_sXR8oqTATtvrAoLYmPXk5F0-QWUBlG-sXHtMktbCoatjEVae2T7wv11ej58S65WZiMKbb2inWLyfeGOulcl3U_oXQ2xMHMwda7u_LEvHzI4yZZ8yMO9GOwtVxadrnq1zPY5yT2XZYe9HNNtLIyW0fPXfzVqseShikpkJ-gyokmYsKs-gKIxW9u3JF0bem79tCoEJ9J7Jaqo1cCYSXvjRlXaihgSn2StphekGTAY2IUsUvqHKxW7U9ryxyCSS1kvA.drjTCtVNn4HdLb7VBBX35rzyGc3RJ5KnwvD0owv4xac&amp;dib_tag=se&amp;keywords=Garnelenh%C3%B6hle%2BAquarium%2BDeko&amp;qid=1777415280&amp;sprefix=garnelenh%C3%B6hle%2Baquarium%2Bdeko%2Caps%2C134&amp;sr=8-9&amp;th=1&amp;linkCode=ll2&amp;tag=geeklist-21&amp;linkId=dc34f0aeb486731c2119bdcfde379ada&amp;ref_=as_li_ss_tl</text:p>
          </table:table-cell>
        </table:table-row>
        <table:table-row table:style-name="ro1">
          <table:table-cell office:value-type="string" calcext:value-type="string">
            <text:p>https://www.amazon.de/Kernpower-Powerball-the-original%C2%AE-Basic/dp/B000VABQHK?__mk_de_DE=%C3%85M%C3%85%C5%BD%C3%95%C3%91&amp;crid=YFC9X6B0DUI7&amp;dib=eyJ2IjoiMSJ9.XxOF_HWDPEs2A74mUHcVp3UHSCjTAglcLdxcj5oVqT4k3mvnblFmj5XyuD2PJh_twO1BkqSYWG657oFQSwrqZ_PCWHyAsIhLcwgoSXk0_qYFz-R-QfaOyYXx24g-56wiaKksReiYKDzvQB_Z711aSqJ_gf2yNivj8fgGBTTF1m8JOLRMM2k5ayDedDvps5qAOmTj3IQw3wXB9KNtZB69qcFiv0FSDQN76Xx16noEuXdP5OZ7-nVFDmFTcr0HnlwPlf06kKXIgbE_kfWCq4oy67Msil4jPOLu0MMKHpxgkII.95E5TRwycbdUgagwptmUuyh6aFIXpqYeYR_sYrW3_dA&amp;dib_tag=se&amp;keywords=Gyroscope+Wrist+Exerciser&amp;qid=1777415339&amp;sprefix=gyroscope+wrist+exerciser%2Caps%2C125&amp;sr=8-8&amp;linkCode=ll2&amp;tag=geeklist-21&amp;linkId=3bd8ee1320c3753b66e2379c239802d1&amp;ref_=as_li_ss_tl</text:p>
          </table:table-cell>
        </table:table-row>
        <table:table-row table:style-name="ro1">
          <table:table-cell office:value-type="string" calcext:value-type="string">
            <text:p>https://www.amazon.de/Eureka-515112-515112-Huzzle-Guss-News-Puzzle/dp/B076Q9XFP7?__mk_de_DE=%C3%85M%C3%85%C5%BD%C3%95%C3%91&amp;crid=1UPAHE6OPBHZV&amp;dib=eyJ2IjoiMSJ9._h4IeLV2bcodfTDJjWOo1pYMH3zB9jK_ktI6T6ZdDGzdhirr4BrGDI_VfU2Nz_m6dYrAE2Ggubsax3dLWP5VKW52Nv9Ga84Ye_jRaOOAtTnwiO_rWyDwxLsfeSsu8-tbnltbx60if4Xjb50w-RWVer7l9ASBXuZV4vwsdREG6t9tJWKLP6k-fdEPgSevAFhWdrExfs1J3wOV8RP1mLxI_qSyMlxyJ2RZ9rHjmcT7sGazsk7X79mcBeO6dYHGSEcF4xplvTJ8Vnv-G2ZczbyG6jnN3Bsf6EA5rs5uWrLSzpc.US95jqmH9-ZIkZvOKt-2zHQ4ndDmGGfcJgMkf0ipwRk&amp;dib_tag=se&amp;keywords=Hanayama+Cast+Puzzle&amp;qid=1777415401&amp;sprefix=hanayama+cast+puzzle%2Caps%2C117&amp;sr=8-7&amp;linkCode=ll2&amp;tag=geeklist-21&amp;linkId=794adde912e8f7963e7a5f69bda1c19f&amp;ref_=as_li_ss_tl</text:p>
          </table:table-cell>
        </table:table-row>
        <table:table-row table:style-name="ro1">
          <table:table-cell office:value-type="string" calcext:value-type="string">
            <text:p>https://www.amazon.de/gp/aw/d/B0F8QPK4DT?_encoding=UTF8&amp;pd_rd_plhdr=t&amp;aaxitk=7a176afa684940343172cf023f14853d&amp;hsa_cr_id=0&amp;qid=1777415462&amp;sr=1-2-1ee1b2e4-01d1-4cd0-b737-4c27ebfc8105&amp;aref=IWIWrQYaIR&amp;pd_rd_w=YaEg4&amp;content-id=amzn1.sym.58538050-dc4d-48e3-988b-4742889016d4%3Aamzn1.sym.58538050-dc4d-48e3-988b-4742889016d4&amp;pf_rd_p=58538050-dc4d-48e3-988b-4742889016d4&amp;pf_rd_r=NWB0788HSR8Y2B3ZAR0T&amp;pd_rd_wg=RycfP&amp;pd_rd_r=297c1bfb-86ee-4ae3-9422-e5037fc95532&amp;th=1&amp;linkCode=ll2&amp;tag=geeklist-21&amp;linkId=c5e70a3aa9d878b03b4370db3859da19&amp;ref_=as_li_ss_tl</text:p>
          </table:table-cell>
        </table:table-row>
        <table:table-row table:style-name="ro1">
          <table:table-cell office:value-type="string" calcext:value-type="string">
            <text:p>https://www.amazon.de/Initiative-lasergeschnittenes-Kreisbasis-l%C3%B6schbaren-Pathfinder/dp/B07VRYCFCS?__mk_de_DE=%C3%85M%C3%85%C5%BD%C3%95%C3%91&amp;crid=35JQ9SNOGVBG5&amp;dib=eyJ2IjoiMSJ9.6HDbc9dqoRRuo6ffeQjoSm1PzKZek5MPJvt1wZCYzltz4EV_64buvOZA2OXyLaNrO-_97ldjFBvDMnqR9FC2zPi3fwKIBLTEnyHvtoeDWCGOiNkkfpT6uQ0uayLpwoeKc4qTY20JibqLyqmMvsaZ6SOC5l02lypYHZPV0F7yb_RyVUz0zBoBhhnpoo4fTSZ9YyCf29Mrp9S3eTUKksscBwZV5ffgZmSl-4C7xByXpWlZ2xJ29rXT_Hzd4vev3fAjjf0GDuZJSPN_gvPbpZxi28cgmzwdKLPEPwzdyuirv68.pbyApIIeq_0IRwbixQ6B1dP-ecLCnIVSE5U1OT4QChA&amp;dib_tag=se&amp;keywords=Initiative+Tracker+f%C3%BCr+Rollenspiele&amp;qid=1777415564&amp;sprefix=initiative+tracker+f%C3%BCr+rollenspiele%2Caps%2C113&amp;sr=8-1&amp;linkCode=ll2&amp;tag=geeklist-21&amp;linkId=3745bf80edf3cad767bd6a189ee4cd1f&amp;ref_=as_li_ss_tl</text:p>
          </table:table-cell>
        </table:table-row>
        <table:table-row table:style-name="ro1">
          <table:table-cell office:value-type="string" calcext:value-type="string">
            <text:p>https://www.amazon.de/OMIGA-Katzenspielzeug-Interaktiver-Trainings%C3%BCbung-Unterhaltung/dp/B0BYN46C3W?__mk_de_DE=%C3%85M%C3%85%C5%BD%C3%95%C3%91&amp;content-id=amzn1.sym.a36179f1-1287-4368-8964-c5a0cda58e2b%3Aamzn1.sym.a36179f1-1287-4368-8964-c5a0cda58e2b&amp;crid=32OIUIN6TZN6P&amp;cv_ct_cx=Interaktives+Katzenball-Spielzeug+LED&amp;keywords=Interaktives+Katzenball-Spielzeug+LED&amp;pd_rd_i=B0BYN46C3W&amp;pd_rd_r=2072747e-fbc2-46f4-bf24-0ae65922303f&amp;pd_rd_w=4WN0V&amp;pd_rd_wg=Whemc&amp;pf_rd_p=a36179f1-1287-4368-8964-c5a0cda58e2b&amp;pf_rd_r=DPTFB4D8SXFP75V1M2BP&amp;qid=1777415655&amp;sbo=RZvfv%2F%2FHxDF%2BO5021pAnSA%3D%3D&amp;sprefix=interaktives+katzenball-spielzeug+led%2Caps%2C110&amp;sr=1-4-3d4a515c-e543-49d6-a336-486aa03b89b3-spons&amp;aref=RHBHx6s8aE&amp;sp_csd=d2lkZ2V0TmFtZT1zcF9zZWFyY2hfdGhlbWF0aWM&amp;psc=1&amp;linkCode=ll2&amp;tag=geeklist-21&amp;linkId=d87ba4fe1282396a61ddf95006b4a3b7&amp;ref_=as_li_ss_tl</text:p>
          </table:table-cell>
        </table:table-row>
        <table:table-row table:style-name="ro1">
          <table:table-cell office:value-type="string" calcext:value-type="string">
            <text:p>https://www.amazon.de/Prokva-Rucksack-Aesthetic-Laptop-H%C3%BClle-Enthalten/dp/B0D2KDWQWC?dib=eyJ2IjoiMSJ9.exMgZRiCv-ap7-F8HQ8z8TA6Rm_QGCoAGNSxRRkdfS2nLohO0FwZk5Ex3Pcivm42ikLkAOTNQqSpvcKs23NzFc3wYF_H9cLxQ9fx1jQclmbGRqTQXOPOeu3xBO8kOl-nc3qs6OYooZ4FiINvDCMgaC3Pkf9rQqxajzPvT-n0nIGVz5vYw6iAAkwxzxLR2wB64ZIr-yBg5idL9OPd97t3cJOFHmxQtSByPTLaxOOYgHb4eFYhFLW_Fk4sI38b9WAoIhh27-ZgMwJMRSrLgdRK4fhHjl2LzeqvmCT7U0NqSxg.nWhjxscv6GE69NofQOt6m2JfthjSInPhyXH4xK2Z8TU&amp;dib_tag=se&amp;keywords=Ita%2BBag%2BInsert%2B%2F%2BPin%2BBag%2BZubeh%C3%B6r&amp;qid=1777415834&amp;sr=8-16-spons&amp;aref=VeYcYTZ4PI&amp;sp_csd=d2lkZ2V0TmFtZT1zcF9tdGY&amp;th=1&amp;linkCode=ll2&amp;tag=geeklist-21&amp;linkId=915d451490e5aff98a6967a81799959c&amp;ref_=as_li_ss_tl</text:p>
          </table:table-cell>
        </table:table-row>
        <table:table-row table:style-name="ro1">
          <table:table-cell office:value-type="string" calcext:value-type="string">
            <text:p>https://www.amazon.de/Rpg-Character-Journal-Sheets-Note-Taking/dp/B08KTFHLCB?__mk_de_DE=%C3%85M%C3%85%C5%BD%C3%95%C3%91&amp;crid=DZGL9VNAH6D7&amp;dib=eyJ2IjoiMSJ9.oRDMmJqAgQdoOANn6SeWXCHxKwRkkGCjK7kjrkV1NPJ7Y2TtEuyq7ZkoZWNJofZKW4KIPEhh6ul-xEABS8JnUfa-xIpmhk1t29eI0aQu7d78X9Rb99tnkR02wvajwu0f5ED3vitYgX5TUq1_abMdCgMJdsK3q5psdsD8vyYeWDeQU3-vc1Wz4YVBPiJrlunoqQtZWC-T5WTSu8Bccv9ZxD4Rp_AI_pBfxL6rSMKwdfU.0D_XOWLb6fyfPnPUfxu7h2rGeXqdxsdjmpClj95AIZw&amp;dib_tag=se&amp;keywords=Kampagnen-Journal+f%C3%BCr+RPG&amp;qid=1777415931&amp;sprefix=kampagnen-journal+f%C3%BCr+rpg%2Caps%2C125&amp;sr=8-4&amp;linkCode=ll2&amp;tag=geeklist-21&amp;linkId=809b36e54ceb59cb02321c5792d1591f&amp;ref_=as_li_ss_tl</text:p>
          </table:table-cell>
        </table:table-row>
        <table:table-row table:style-name="ro1">
          <table:table-cell office:value-type="string" calcext:value-type="string">
            <text:p>https://www.amazon.de/Stilvoll-Fensterliege-H%C3%A4ngematte-Abnehmbarem-Wendebezug/dp/B0F4P6GQJS?__mk_de_DE=%C3%85M%C3%85%C5%BD%C3%95%C3%91&amp;crid=1BBXEX3TA72H5&amp;dib=eyJ2IjoiMSJ9.81bQPr8Q_PfaKjf0_egNPwWhE12VyRlcGW-M2r-JZ_j2WneYa-EHdCVO5c7ZnOjO6o6mmZUCby-M0bEQlspCOTYdVMwvyH40Sv89C3JDAIr3GO0SFQvrIqD4MhkJdqKXCy5Eu7n0OiCmFn8KxQ8QpRvx_dS_L0GKdPt9xTr9blLnSNJVUOXs-3YbhE7MYxS3uqq97uqFE79D9gFfE-ZOIIYBKP0nQF0oAxyTs3t5KSW87jcyoIIPJm4u5LTxPvk6PltUvVJj04M2EnMur-R9e1-dOzVtcyW3k2bUgBcZRqY.SBIVChtbw3Y6ktccWV-R3H7Dm8Ad_Ov6p--fT0agJVk&amp;dib_tag=se&amp;keywords=Katzen%2BFensterliege%2B%2F%2BHammock&amp;qid=1777415981&amp;sprefix=katzen%2Bfensterliege%2B%2F%2Bhammock%2Caps%2C126&amp;sr=8-7&amp;th=1&amp;linkCode=ll2&amp;tag=geeklist-21&amp;linkId=3f9c51b5143a3bea8890b1e55b8cd973&amp;ref_=as_li_ss_t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9T08:13:53.000622082</meta:creation-date>
    <dc:date>2026-04-29T08:15:18.458574576</dc:date>
    <meta:editing-duration>PT1M27S</meta:editing-duration>
    <meta:editing-cycles>1</meta:editing-cycles>
    <meta:document-statistic meta:table-count="1" meta:cell-count="40" meta:object-count="0"/>
    <meta:generator>LibreOffice/24.2.7.2$Linux_X86_64 LibreOffice_project/420$Build-2</meta:generator>
  </office:meta>
</office:document-meta>
</file>